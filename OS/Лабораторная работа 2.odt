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2000001F195540B0F.png" manifest:media-type="image/png"/>
  <manifest:file-entry manifest:full-path="Pictures/100000010000011B0000002167B789BF.png" manifest:media-type="image/png"/>
  <manifest:file-entry manifest:full-path="Pictures/10000001000002C400000036429F1F69.png" manifest:media-type="image/png"/>
  <manifest:file-entry manifest:full-path="Pictures/10000001000004DD00000323D8D297E1.png" manifest:media-type="image/png"/>
  <manifest:file-entry manifest:full-path="Pictures/10000001000003680000032FF2C529BC.png" manifest:media-type="image/png"/>
  <manifest:file-entry manifest:full-path="Pictures/10000001000003C100000153D85D3D5E.png" manifest:media-type="image/png"/>
  <manifest:file-entry manifest:full-path="Pictures/10000001000001AB0000003D93AD3A1E.png" manifest:media-type="image/png"/>
  <manifest:file-entry manifest:full-path="Pictures/10000001000003C1000001302A266AAC.png" manifest:media-type="image/png"/>
  <manifest:file-entry manifest:full-path="Pictures/10000001000002F900000067DDA9DC94.png" manifest:media-type="image/png"/>
  <manifest:file-entry manifest:full-path="Pictures/10000001000000FB00000055D528CE0F.png" manifest:media-type="image/png"/>
  <manifest:file-entry manifest:full-path="Pictures/10000001000002880000031F4DEE657E.png" manifest:media-type="image/png"/>
  <manifest:file-entry manifest:full-path="Pictures/10000001000002DF000000730C3B025C.png" manifest:media-type="image/png"/>
  <manifest:file-entry manifest:full-path="Pictures/10000001000003A700000130B06D5440.png" manifest:media-type="image/png"/>
  <manifest:file-entry manifest:full-path="Pictures/10000001000001AB000000C073D58466.png" manifest:media-type="image/png"/>
  <manifest:file-entry manifest:full-path="Pictures/10000001000002EE0000004965C71661.png" manifest:media-type="image/png"/>
  <manifest:file-entry manifest:full-path="Pictures/10000001000002EE000002E774BFE739.png" manifest:media-type="image/png"/>
  <manifest:file-entry manifest:full-path="Pictures/10000001000001F9000001F877C32550.png" manifest:media-type="image/png"/>
  <manifest:file-entry manifest:full-path="Pictures/100000010000020200000023DF1F32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727cm" table:align="center" style:writing-mode="lr-tb"/>
    </style:style>
    <style:style style:name="Таблица1.A" style:family="table-column">
      <style:table-column-properties style:column-width="1.864cm"/>
    </style:style>
    <style:style style:name="Таблица1.B" style:family="table-column">
      <style:table-column-properties style:column-width="0.422cm"/>
    </style:style>
    <style:style style:name="Таблица1.C" style:family="table-column">
      <style:table-column-properties style:column-width="1.579cm"/>
    </style:style>
    <style:style style:name="Таблица1.D" style:family="table-column">
      <style:table-column-properties style:column-width="1cm"/>
    </style:style>
    <style:style style:name="Таблица1.E" style:family="table-column">
      <style:table-column-properties style:column-width="0.501cm"/>
    </style:style>
    <style:style style:name="Таблица1.F" style:family="table-column">
      <style:table-column-properties style:column-width="0.891cm"/>
    </style:style>
    <style:style style:name="Таблица1.G" style:family="table-column">
      <style:table-column-properties style:column-width="3.11cm"/>
    </style:style>
    <style:style style:name="Таблица1.H" style:family="table-column">
      <style:table-column-properties style:column-width="0.042cm"/>
    </style:style>
    <style:style style:name="Таблица1.J" style:family="table-column">
      <style:table-column-properties style:column-width="0.286cm"/>
    </style:style>
    <style:style style:name="Таблица1.K" style:family="table-column">
      <style:table-column-properties style:column-width="0.499cm"/>
    </style:style>
    <style:style style:name="Таблица1.L" style:family="table-column">
      <style:table-column-properties style:column-width="2.041cm"/>
    </style:style>
    <style:style style:name="Таблица1.M" style:family="table-column">
      <style:table-column-properties style:column-width="0.533cm"/>
    </style:style>
    <style:style style:name="Таблица1.N" style:family="table-column">
      <style:table-column-properties style:column-width="2.805cm"/>
    </style:style>
    <style:style style:name="Таблица1.O" style:family="table-column">
      <style:table-column-properties style:column-width="0.078cm"/>
    </style:style>
    <style:style style:name="Таблица1.P" style:family="table-column">
      <style:table-column-properties style:column-width="0.041cm"/>
    </style:style>
    <style:style style:name="Таблица1.Q" style:family="table-column">
      <style:table-column-properties style:column-width="0.381cm"/>
    </style:style>
    <style:style style:name="Таблица1.R" style:family="table-column">
      <style:table-column-properties style:column-width="0.649cm"/>
    </style:style>
    <style:style style:name="Таблица1.T" style:family="table-column">
      <style:table-column-properties style:column-width="0.164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R1" style:family="table-cell">
      <style:table-cell-properties fo:padding="0cm" fo:border="none"/>
    </style:style>
    <style:style style:name="Таблица1.B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R2" style:family="table-cell">
      <style:table-cell-properties fo:padding="0cm" fo:border="none"/>
    </style:style>
    <style:style style:name="Таблица1.R3" style:family="table-cell">
      <style:table-cell-properties fo:padding="0cm" fo:border="none"/>
    </style:style>
    <style:style style:name="Таблица1.R4" style:family="table-cell">
      <style:table-cell-properties fo:padding="0cm" fo:border="none"/>
    </style:style>
    <style:style style:name="Таблица1.R5" style:family="table-cell">
      <style:table-cell-properties fo:padding="0cm" fo:border="none"/>
    </style:style>
    <style:style style:name="Таблица1.R6" style:family="table-cell">
      <style:table-cell-properties fo:padding="0cm" fo:border="none"/>
    </style:style>
    <style:style style:name="Таблица1.R7" style:family="table-cell">
      <style:table-cell-properties fo:padding="0cm" fo:border="none"/>
    </style:style>
    <style:style style:name="Таблица1.8" style:family="table-row">
      <style:table-row-properties fo:keep-together="auto"/>
    </style:style>
    <style:style style:name="Таблица1.R8" style:family="table-cell">
      <style:table-cell-properties fo:padding="0cm" fo:border="none"/>
    </style:style>
    <style:style style:name="Таблица1.R9" style:family="table-cell">
      <style:table-cell-properties fo:padding="0cm" fo:border="none"/>
    </style:style>
    <style:style style:name="Таблица1.R10" style:family="table-cell">
      <style:table-cell-properties fo:padding="0cm" fo:border="none"/>
    </style:style>
    <style:style style:name="Таблица1.11" style:family="table-row">
      <style:table-row-properties style:min-row-height="0.601cm" fo:keep-together="auto"/>
    </style:style>
    <style:style style:name="Таблица1.R11" style:family="table-cell">
      <style:table-cell-properties fo:padding="0cm" fo:border="none"/>
    </style:style>
    <style:style style:name="Таблица1.B1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R12" style:family="table-cell">
      <style:table-cell-properties fo:padding="0cm" fo:border="none"/>
    </style:style>
    <style:style style:name="Таблица1.13" style:family="table-row">
      <style:table-row-properties style:min-row-height="0.637cm" fo:keep-together="auto"/>
    </style:style>
    <style:style style:name="Таблица1.R13" style:family="table-cell">
      <style:table-cell-properties fo:padding="0cm" fo:border="none"/>
    </style:style>
    <style:style style:name="Таблица1.R14" style:family="table-cell">
      <style:table-cell-properties fo:padding="0cm" fo:border="none"/>
    </style:style>
    <style:style style:name="Таблица1.15" style:family="table-row">
      <style:table-row-properties style:min-row-height="0.353cm" fo:keep-together="auto"/>
    </style:style>
    <style:style style:name="Таблица1.F1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R15" style:family="table-cell">
      <style:table-cell-properties fo:padding="0cm" fo:border="none"/>
    </style:style>
    <style:style style:name="Таблица1.R16" style:family="table-cell">
      <style:table-cell-properties fo:padding="0cm" fo:border="none"/>
    </style:style>
    <style:style style:name="Таблица1.S17" style:family="table-cell">
      <style:table-cell-properties fo:padding="0cm" fo:border="none"/>
    </style:style>
    <style:style style:name="Таблица1.S18" style:family="table-cell">
      <style:table-cell-properties fo:padding="0cm" fo:border="none"/>
    </style:style>
    <style:style style:name="Таблица1.S19" style:family="table-cell">
      <style:table-cell-properties fo:padding="0cm" fo:border="none"/>
    </style:style>
    <style:style style:name="Таблица1.S20" style:family="table-cell">
      <style:table-cell-properties fo:padding="0cm" fo:border="none"/>
    </style:style>
    <style:style style:name="Таблица1.R21" style:family="table-cell">
      <style:table-cell-properties fo:padding="0cm" fo:border="none"/>
    </style:style>
    <style:style style:name="Таблица1.S22" style:family="table-cell">
      <style:table-cell-properties fo:padding="0cm" fo:border="none"/>
    </style:style>
    <style:style style:name="Таблица1.S23" style:family="table-cell">
      <style:table-cell-properties fo:padding="0cm" fo:border="none"/>
    </style:style>
    <style:style style:name="Таблица1.24" style:family="table-row">
      <style:table-row-properties style:min-row-height="0.586cm" fo:keep-together="auto"/>
    </style:style>
    <style:style style:name="Таблица1.R24" style:family="table-cell">
      <style:table-cell-properties fo:padding="0cm" fo:border="none"/>
    </style:style>
    <style:style style:name="Таблица1.S26" style:family="table-cell">
      <style:table-cell-properties fo:padding="0cm" fo:border="none"/>
    </style:style>
    <style:style style:name="Таблица1.S29" style:family="table-cell">
      <style:table-cell-properties fo:padding="0cm" fo:border="none"/>
    </style:style>
    <style:style style:name="Таблица1.S30" style:family="table-cell">
      <style:table-cell-properties fo:padding="0cm" fo:border="none"/>
    </style:style>
    <style:style style:name="Таблица1.T31" style:family="table-cell">
      <style:table-cell-properties fo:padding="0cm" fo:border="none"/>
    </style:style>
    <style:style style:name="Таблица1.T32" style:family="table-cell">
      <style:table-cell-properties fo:padding="0cm" fo:border="none"/>
    </style:style>
    <style:style style:name="Таблица1.33" style:family="table-row">
      <style:table-row-properties style:row-height="2.866cm" fo:keep-together="auto"/>
    </style:style>
    <style:style style:name="Таблица1.T33" style:family="table-cell">
      <style:table-cell-properties fo:padding="0cm" fo:border="none"/>
    </style:style>
    <style:style style:name="Таблица1.R34" style:family="table-cell">
      <style:table-cell-properties fo:padding="0cm" fo:border="none"/>
    </style:style>
    <style:style style:name="Таблица1.R35" style:family="table-cell">
      <style:table-cell-properties fo:padding="0cm" fo:border="none"/>
    </style:style>
    <style:style style:name="P1" style:family="paragraph" style:parent-style-name="Standard">
      <style:paragraph-properties fo:margin-left="-0.042cm" fo:margin-right="0cm" style:line-height-at-least="0.423cm" fo:text-align="center" style:justify-single-word="false"/>
      <style:text-properties fo:text-transform="uppercase" fo:font-size="10pt" officeooo:paragraph-rsid="001d8260" style:font-size-asian="10pt"/>
    </style:style>
    <style:style style:name="P2" style:family="paragraph" style:parent-style-name="Standard">
      <style:paragraph-properties fo:margin-left="-0.042cm" fo:margin-right="0cm" style:line-height-at-least="0.423cm" fo:text-align="center" style:justify-single-word="false"/>
      <style:text-properties fo:font-size="11pt" officeooo:paragraph-rsid="001d8260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true" fo:text-align="center" style:justify-single-word="false"/>
      <style:text-properties officeooo:paragraph-rsid="001d8260"/>
    </style:style>
    <style:style style:name="P4" style:family="paragraph" style:parent-style-name="Standard">
      <style:paragraph-properties fo:margin-top="0cm" fo:margin-bottom="0cm" style:contextual-spacing="true" fo:text-align="center" style:justify-single-word="false"/>
      <style:text-properties fo:font-size="11pt" fo:font-weight="bold" officeooo:paragraph-rsid="001d8260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3pt" officeooo:paragraph-rsid="001d8260" style:font-size-asian="13pt"/>
    </style:style>
    <style:style style:name="P6" style:family="paragraph" style:parent-style-name="Standard">
      <style:paragraph-properties style:snap-to-layout-grid="false"/>
      <style:text-properties fo:font-size="13pt" officeooo:paragraph-rsid="001d8260" style:font-size-asian="13pt"/>
    </style:style>
    <style:style style:name="P7" style:family="paragraph" style:parent-style-name="Standard">
      <style:paragraph-properties fo:text-align="center" style:justify-single-word="false" style:snap-to-layout-grid="false"/>
      <style:text-properties officeooo:paragraph-rsid="001d8260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1d8260" style:font-weight-asian="bold"/>
    </style:style>
    <style:style style:name="P9" style:family="paragraph" style:parent-style-name="Standard">
      <style:paragraph-properties style:snap-to-layout-grid="false"/>
      <style:text-properties officeooo:paragraph-rsid="001d8260"/>
    </style:style>
    <style:style style:name="P10" style:family="paragraph" style:parent-style-name="Standard">
      <style:paragraph-properties fo:text-align="center" style:justify-single-word="false"/>
      <style:text-properties fo:font-size="9pt" officeooo:paragraph-rsid="001d8260" style:font-size-asian="9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9pt" officeooo:paragraph-rsid="001d8260" style:font-size-asian="9pt"/>
    </style:style>
    <style:style style:name="P12" style:family="paragraph" style:parent-style-name="Heading_20_3">
      <style:paragraph-properties fo:margin-right="0cm" fo:text-align="center" style:justify-single-word="false" fo:text-indent="0.026cm" style:auto-text-indent="false"/>
      <style:text-properties fo:font-size="16pt" fo:font-weight="bold" officeooo:paragraph-rsid="001d8260" style:font-size-asian="16pt" style:font-weight-asian="bold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paragraph-rsid="001d8260" style:font-size-asian="16pt" style:font-weight-asian="bold" style:font-size-complex="16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6pt" fo:font-weight="bold" officeooo:paragraph-rsid="001d8260" style:font-size-asian="16pt" style:font-weight-asian="bold" style:font-size-complex="16pt"/>
    </style:style>
    <style:style style:name="P15" style:family="paragraph" style:parent-style-name="Heading_20_3">
      <style:paragraph-properties>
        <style:tab-stops>
          <style:tab-stop style:position="10.633cm"/>
        </style:tab-stops>
      </style:paragraph-properties>
      <style:text-properties officeooo:paragraph-rsid="001d8260"/>
    </style:style>
    <style:style style:name="P16" style:family="paragraph" style:parent-style-name="Standard">
      <style:paragraph-properties fo:text-align="justify" style:justify-single-word="false"/>
      <style:text-properties fo:font-size="13pt" officeooo:paragraph-rsid="001d8260" style:font-size-asian="13pt" style:font-size-complex="13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3pt" officeooo:paragraph-rsid="001d8260" style:font-size-asian="13pt" style:font-size-complex="13pt"/>
    </style:style>
    <style:style style:name="P18" style:family="paragraph" style:parent-style-name="Standard">
      <style:paragraph-properties fo:text-align="end" style:justify-single-word="false" style:snap-to-layout-grid="false"/>
      <style:text-properties officeooo:paragraph-rsid="001d8260"/>
    </style:style>
    <style:style style:name="P19" style:family="paragraph" style:parent-style-name="Standard">
      <style:paragraph-properties fo:text-align="justify" style:justify-single-word="false"/>
      <style:text-properties fo:font-size="13pt" officeooo:rsid="002cb826" officeooo:paragraph-rsid="002cb826" style:font-size-asian="13pt" style:font-size-complex="13pt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/>
      <style:text-properties officeooo:paragraph-rsid="001d8260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officeooo:paragraph-rsid="001d8260"/>
    </style:style>
    <style:style style:name="P22" style:family="paragraph" style:parent-style-name="Standard">
      <style:paragraph-properties fo:margin-top="0.212cm" fo:margin-bottom="0cm" style:contextual-spacing="false" style:snap-to-layout-grid="false"/>
      <style:text-properties officeooo:paragraph-rsid="001d8260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8pt" officeooo:paragraph-rsid="001d8260" style:font-size-asian="8pt"/>
    </style:style>
    <style:style style:name="P24" style:family="paragraph" style:parent-style-name="Standard">
      <style:text-properties officeooo:paragraph-rsid="001d8260"/>
    </style:style>
    <style:style style:name="P25" style:family="paragraph" style:parent-style-name="Standard">
      <style:paragraph-properties style:snap-to-layout-grid="false"/>
      <style:text-properties fo:font-size="8pt" officeooo:paragraph-rsid="001d8260" style:font-size-asian="8pt"/>
    </style:style>
    <style:style style:name="P26" style:family="paragraph" style:parent-style-name="Standard">
      <style:paragraph-properties>
        <style:tab-stops>
          <style:tab-stop style:position="7.826cm"/>
        </style:tab-stops>
      </style:paragraph-properties>
      <style:text-properties officeooo:paragraph-rsid="001d8260"/>
    </style:style>
    <style:style style:name="P27" style:family="paragraph" style:parent-style-name="Standard">
      <style:paragraph-properties fo:text-align="center" style:justify-single-word="false"/>
      <style:text-properties fo:font-size="8pt" officeooo:paragraph-rsid="001d8260" style:font-size-asian="8pt" style:font-size-complex="8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8pt" officeooo:paragraph-rsid="001d8260" style:font-size-asian="8pt" style:font-size-complex="8pt"/>
    </style:style>
    <style:style style:name="P29" style:family="paragraph" style:parent-style-name="Standard">
      <style:paragraph-properties>
        <style:tab-stops>
          <style:tab-stop style:position="4.519cm"/>
          <style:tab-stop style:position="4.962cm"/>
          <style:tab-stop style:position="7.844cm" style:type="center"/>
        </style:tab-stops>
      </style:paragraph-properties>
      <style:text-properties officeooo:paragraph-rsid="001d8260"/>
    </style:style>
    <style:style style:name="P30" style:family="paragraph" style:parent-style-name="Standard">
      <style:paragraph-properties>
        <style:tab-stops>
          <style:tab-stop style:position="1.713cm"/>
          <style:tab-stop style:position="7.844cm" style:type="center"/>
        </style:tab-stops>
      </style:paragraph-properties>
      <style:text-properties officeooo:paragraph-rsid="001d8260"/>
    </style:style>
    <style:style style:name="P31" style:family="paragraph" style:parent-style-name="Standard">
      <style:paragraph-properties style:snap-to-layout-grid="false">
        <style:tab-stops>
          <style:tab-stop style:position="4.519cm"/>
          <style:tab-stop style:position="4.962cm"/>
          <style:tab-stop style:position="7.844cm" style:type="center"/>
        </style:tab-stops>
      </style:paragraph-properties>
      <style:text-properties officeooo:paragraph-rsid="001d8260"/>
    </style:style>
    <style:style style:name="P32" style:family="paragraph" style:parent-style-name="Standard">
      <style:paragraph-properties style:snap-to-layout-grid="false">
        <style:tab-stops>
          <style:tab-stop style:position="1.713cm"/>
          <style:tab-stop style:position="7.844cm" style:type="center"/>
        </style:tab-stops>
      </style:paragraph-properties>
      <style:text-properties officeooo:paragraph-rsid="001d8260"/>
    </style:style>
    <style:style style:name="P33" style:family="paragraph" style:parent-style-name="Standard">
      <style:paragraph-properties>
        <style:tab-stops>
          <style:tab-stop style:position="3.722cm"/>
        </style:tab-stops>
      </style:paragraph-properties>
      <style:text-properties officeooo:paragraph-rsid="001d8260"/>
    </style:style>
    <style:style style:name="P34" style:family="paragraph" style:parent-style-name="Standard">
      <style:paragraph-properties>
        <style:tab-stops>
          <style:tab-stop style:position="2.392cm"/>
        </style:tab-stops>
      </style:paragraph-properties>
      <style:text-properties officeooo:paragraph-rsid="001d8260"/>
    </style:style>
    <style:style style:name="P35" style:family="paragraph" style:parent-style-name="Standard">
      <style:paragraph-properties>
        <style:tab-stops>
          <style:tab-stop style:position="3.634cm"/>
        </style:tab-stops>
      </style:paragraph-properties>
      <style:text-properties officeooo:paragraph-rsid="001d8260"/>
    </style:style>
    <style:style style:name="P36" style:family="paragraph" style:parent-style-name="Standard">
      <style:text-properties officeooo:paragraph-rsid="001d8260" style:font-size-complex="12pt"/>
    </style:style>
    <style:style style:name="P37" style:family="paragraph" style:parent-style-name="Standard">
      <style:paragraph-properties fo:text-align="center" style:justify-single-word="false" style:snap-to-layout-grid="false"/>
      <style:text-properties fo:font-size="9pt" officeooo:paragraph-rsid="001d8260" style:font-size-asian="9pt" style:font-size-complex="12pt"/>
    </style:style>
    <style:style style:name="P38" style:family="paragraph" style:parent-style-name="Standard">
      <style:paragraph-properties style:snap-to-layout-grid="false"/>
      <style:text-properties fo:font-size="9pt" officeooo:paragraph-rsid="001d8260" style:font-size-asian="9pt"/>
    </style:style>
    <style:style style:name="P39" style:family="paragraph" style:parent-style-name="Standard">
      <style:paragraph-properties fo:text-align="center" style:justify-single-word="false" style:snap-to-layout-grid="false"/>
      <style:text-properties officeooo:paragraph-rsid="001d8260" style:font-size-complex="12pt"/>
    </style:style>
    <style:style style:name="P40" style:family="paragraph" style:parent-style-name="Standard">
      <style:paragraph-properties>
        <style:tab-stops>
          <style:tab-stop style:position="4.195cm"/>
        </style:tab-stops>
      </style:paragraph-properties>
      <style:text-properties officeooo:paragraph-rsid="001d8260" style:font-size-complex="12pt"/>
    </style:style>
    <style:style style:name="P41" style:family="paragraph" style:parent-style-name="Standard">
      <style:paragraph-properties fo:text-align="center" style:justify-single-word="false" style:snap-to-layout-grid="false"/>
      <style:text-properties fo:font-size="9pt" fo:letter-spacing="-0.007cm" officeooo:paragraph-rsid="001d8260" style:font-size-asian="9pt"/>
    </style:style>
    <style:style style:name="P42" style:family="paragraph" style:parent-style-name="Standard">
      <style:text-properties fo:font-size="8pt" officeooo:paragraph-rsid="001d8260" style:font-size-asian="8pt" style:font-size-complex="8pt"/>
    </style:style>
    <style:style style:name="P43" style:family="paragraph" style:parent-style-name="Standard">
      <style:paragraph-properties style:snap-to-layout-grid="false"/>
      <style:text-properties fo:font-size="8pt" officeooo:paragraph-rsid="001d8260" style:font-size-asian="8pt" style:font-size-complex="8pt"/>
    </style:style>
    <style:style style:name="P44" style:family="paragraph" style:parent-style-name="Standard">
      <style:paragraph-properties>
        <style:tab-stops>
          <style:tab-stop style:position="0.797cm"/>
        </style:tab-stops>
      </style:paragraph-properties>
      <style:text-properties officeooo:paragraph-rsid="001d8260"/>
    </style:style>
    <style:style style:name="P45" style:family="paragraph" style:parent-style-name="Standard">
      <style:paragraph-properties>
        <style:tab-stops>
          <style:tab-stop style:position="0.355cm"/>
        </style:tab-stops>
      </style:paragraph-properties>
      <style:text-properties officeooo:paragraph-rsid="001d8260"/>
    </style:style>
    <style:style style:name="P46" style:family="paragraph" style:parent-style-name="Standard">
      <style:paragraph-properties fo:text-align="center" style:justify-single-word="false"/>
      <style:text-properties officeooo:paragraph-rsid="001d8260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1d8260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1ea405" officeooo:paragraph-rsid="001ea405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1ea405" style:font-size-asian="14pt" style:font-size-complex="14pt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2a2ace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2a2ace" officeooo:paragraph-rsid="002a2ace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1ea405" officeooo:paragraph-rsid="002a2ace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2a2ace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2a82dc" officeooo:paragraph-rsid="002a82dc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2aaa2c" officeooo:paragraph-rsid="002aaa2c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2b3ff5" officeooo:paragraph-rsid="002b3ff5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2b3ff5" style:font-size-asian="14pt" style:font-size-complex="14pt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2b3ff5" style:font-size-asian="14pt" style:font-weight-asian="bold" style:font-size-complex="14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1ea405" officeooo:paragraph-rsid="002b3ff5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2cb826" officeooo:paragraph-rsid="002cb826" style:font-size-asian="14pt" style:font-weight-asian="normal" style:font-size-complex="14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2cb826" style:font-size-asian="14pt" style:font-weight-asian="bold" style:font-size-complex="14pt" style:font-weight-complex="bold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reak-before="page" fo:background-color="transparent"/>
      <style:text-properties style:font-name="Times New Roman" fo:font-size="14pt" fo:font-weight="bold" officeooo:rsid="001d8260" officeooo:paragraph-rsid="002b3ff5" style:font-size-asian="14pt" style:font-weight-asian="bold" style:font-size-complex="14pt" style:font-weight-complex="bold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d8260"/>
    </style:style>
    <style:style style:name="T4" style:family="text">
      <style:text-properties officeooo:rsid="0024e88d"/>
    </style:style>
    <style:style style:name="T5" style:family="text">
      <style:text-properties officeooo:rsid="002a2ace"/>
    </style:style>
    <style:style style:name="T6" style:family="text">
      <style:text-properties officeooo:rsid="001ea405"/>
    </style:style>
    <style:style style:name="T7" style:family="text">
      <style:text-properties officeooo:rsid="001fa7e6"/>
    </style:style>
    <style:style style:name="T8" style:family="text">
      <style:text-properties officeooo:rsid="002cb826"/>
    </style:style>
    <style:style style:name="T9" style:family="text">
      <style:text-properties officeooo:rsid="002a82dc"/>
    </style:style>
    <style:style style:name="T10" style:family="text">
      <style:text-properties officeooo:rsid="002aaa2c"/>
    </style:style>
    <style:style style:name="T11" style:family="text">
      <style:text-properties officeooo:rsid="002cda36"/>
    </style:style>
    <style:style style:name="T12" style:family="text">
      <style:text-properties officeooo:rsid="002b3ff5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</text:p>
      <text:p text:style-name="P2">высшего образования</text:p>
      <text:p text:style-name="P3"><text:span text:style-name="T1">«Северный (Арктический) федеральный университет имени М.В. Ломоносова</text:span><text:span text:style-name="T2">»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B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B"/>
        <table:table-column table:style-name="Таблица1.T"/>
        <table:table-row table:style-name="Таблица1.1">
          <table:table-cell table:style-name="Таблица1.A1" table:number-columns-spanned="1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B2" table:number-columns-spanned="13" office:value-type="string">
            <text:p text:style-name="P8"><text:bookmark text:name="department"/>Институт судостроения и морской арктической техники (Севмашвтуз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10">(наименование высшей школы/ филиала/ института/ колледж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1"/>
          </table:table-cell>
          <table:covered-table-cell/>
          <table:covered-table-cell/>
          <table:table-cell table:style-name="Таблица1.R3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1"/>
          </table:table-cell>
          <table:covered-table-cell/>
          <table:covered-table-cell/>
          <table:table-cell table:style-name="Таблица1.R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14" office:value-type="string">
            <text:h text:style-name="P12" text:outline-level="3">ОТЧЕТ</text:h>
            <text:p text:style-name="P13">о лабораторном практикум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  <table:table-cell table:style-name="Таблица1.R6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h text:style-name="P15" text:outline-level="3"><text:tab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7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A1" table:number-columns-spanned="14" office:value-type="string">
            <text:p text:style-name="P16">По дисциплине<text:bookmark text:name="displ_1"/> <text:span text:style-name="T3">Общепрофессиональный (модуль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7"/>
          </table:table-cell>
          <table:covered-table-cell/>
          <table:covered-table-cell/>
          <table:table-cell table:style-name="Таблица1.R8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B2" table:number-columns-spanned="7" office:value-type="string">
            <text:p text:style-name="P18"><text:bookmark text:name="displ_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9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B2" table:number-columns-spanned="14" office:value-type="string">
            <text:p text:style-name="P19">Основные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7"/>
          </table:table-cell>
          <table:covered-table-cell/>
          <table:covered-table-cell/>
          <table:table-cell table:style-name="Таблица1.R10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1">
          <table:table-cell table:style-name="Таблица1.A1" table:number-columns-spanned="14" office:value-type="string">
            <text:p text:style-name="P20"><text:bookmark text:name="thema_1"/>______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1"/>
          </table:table-cell>
          <table:covered-table-cell/>
          <table:covered-table-cell/>
          <table:table-cell table:style-name="Таблица1.R1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1">
          <table:table-cell table:style-name="Таблица1.A1" office:value-type="string">
            <text:p text:style-name="P22"/>
          </table:table-cell>
          <table:table-cell table:style-name="Таблица1.B12" table:number-columns-spanned="1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1"/>
          </table:table-cell>
          <table:covered-table-cell/>
          <table:covered-table-cell/>
          <table:table-cell table:style-name="Таблица1.R1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3">
          <table:table-cell table:style-name="Таблица1.A1" office:value-type="string">
            <text:p text:style-name="P23"/>
          </table:table-cell>
          <table:table-cell table:style-name="Таблица1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24"><text:bookmark text:name="thema_2"/>Выполнил (-а) обучающийся (-аяся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3"/>
          </table:table-cell>
          <table:covered-table-cell/>
          <table:covered-table-cell/>
          <table:table-cell table:style-name="Таблица1.R13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26"><text:bookmark text:name="thema_3"/><text:span text:style-name="T3">Абрамова Полина Александровна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1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5"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F15" table:number-columns-spanned="9" office:value-type="string">
            <text:p text:style-name="P27"><text:bookmark text:name="thema_4"/>(ФИО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8"/>
          </table:table-cell>
          <table:covered-table-cell/>
          <table:covered-table-cell/>
          <table:table-cell table:style-name="Таблица1.R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24">Направление подготовки / специальность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16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29"><text:tab/><text:tab/><text:tab/></text:p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10" office:value-type="string">
            <text:p text:style-name="P30"><text:span text:style-name="T3">09.03.02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17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18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33"><text:tab/>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27">(код и наименовани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8"/>
          </table:table-cell>
          <table:covered-table-cell/>
          <table:covered-table-cell/>
          <table:table-cell table:style-name="Таблица1.S19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10" office:value-type="string">
            <text:p text:style-name="P34">Курс:<text:tab/><text:span text:style-name="T3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20" table:number-columns-spanned="2" office:value-type="string">
            <text:p text:style-name="P9"/>
          </table:table-cell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35">Группа:<text:tab/><text:span text:style-name="T3">15331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2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22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36">Руководитель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7"/>
          </table:table-cell>
          <table:covered-table-cell/>
          <table:covered-table-cell/>
          <table:table-cell table:style-name="Таблица1.S23" table:number-columns-spanned="2" office:value-type="string">
            <text:p text:style-name="P38"/>
          </table:table-cell>
          <table:covered-table-cell/>
        </table:table-row>
        <table:table-row table:style-name="Таблица1.24">
          <table:table-cell table:style-name="Таблица1.A1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40"><text:span text:style-name="T3">Ожигин Иван Сергеевич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7"/>
          </table:table-cell>
          <table:covered-table-cell/>
          <table:covered-table-cell/>
          <table:table-cell table:style-name="Таблица1.R24" table:number-columns-spanned="3" office:value-type="string">
            <text:p text:style-name="P38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28"><text:bookmark text:name="status"/><text:bookmark text:name="fio"/>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1" office:value-type="string">
            <text:p text:style-name="P27">(ФИО руководител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columns-spanned="15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41"/>
          </table:table-cell>
          <table:covered-table-cell/>
          <table:covered-table-cell/>
          <table:table-cell table:style-name="Таблица1.S26" table:number-columns-spanned="2" office:value-type="string">
            <text:p text:style-name="P38"/>
          </table:table-cell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24">Отметка о зачете</text:p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6" office:value-type="string">
            <text:p text:style-name="P27">(отметка прописью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28"/>
          </table:table-cell>
          <table:table-cell table:style-name="Таблица1.A1" table:number-columns-spanned="5" office:value-type="string">
            <text:p text:style-name="P27">(дата)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24">Руководитель</text:p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29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F15" table:number-columns-spanned="6" office:value-type="string">
            <text:p text:style-name="P42"><text:s text:c="14"/>(подпись руководителя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28"/>
          </table:table-cell>
          <table:table-cell table:style-name="Таблица1.F15" table:number-columns-spanned="4" office:value-type="string">
            <text:p text:style-name="P27">(инициалы, фамилия)</text:p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43"/>
          </table:table-cell>
          <table:covered-table-cell/>
          <table:covered-table-cell/>
          <table:table-cell table:style-name="Таблица1.S30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44"><text:tab/>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45"><text:tab/>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T31" office:value-type="string">
            <text:p text:style-name="P9"/>
          </table:table-cell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T32" office:value-type="string">
            <text:p text:style-name="P9"/>
          </table:table-cell>
        </table:table-row>
        <table:table-row table:style-name="Таблица1.33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  <text:p text:style-name="P46"/>
            <text:p text:style-name="P46"/>
            <text:p text:style-name="P46"/>
            <text:p text:style-name="P46"/>
            <text:p text:style-name="P46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T33" office:value-type="string"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9"/>
            <text:p text:style-name="P46"/>
            <text:p text:style-name="P46"><text:span text:style-name="T3">Архангельск</text:span> 20<text:span text:style-name="T3">2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3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7"><text:bookmark text:name="year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3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47"><text:soft-page-break/>Задание 1.</text:p>
      <text:p text:style-name="P48">Созда<text:span text:style-name="T4">ть </text:span><text:span text:style-name="T5">файл отчета</text:span></text:p>
      <text:p text:style-name="P48"/>
      <text:p text:style-name="P48"><draw:frame draw:style-name="fr1" draw:name="Изображение3" text:anchor-type="char" svg:width="17cm" svg:height="1.296cm" draw:z-index="1"><draw:image xlink:href="Pictures/10000001000002C400000036429F1F69.png" xlink:type="simple" xlink:show="embed" xlink:actuate="onLoad" draw:mime-type="image/png"/></draw:frame></text:p>
      <text:p text:style-name="P48"/>
      <text:p text:style-name="P49"><text:span text:style-name="T3">Рисунок </text:span><text:span text:style-name="T6">1</text:span><text:span text:style-name="T3"> — </text:span><text:span text:style-name="T7">Создание </text:span><text:span text:style-name="T8">файла отчета</text:span></text:p>
      <text:p text:style-name="P49"/>
      <text:p text:style-name="P50">Задание <text:span text:style-name="T5">2.</text:span></text:p>
      <text:p text:style-name="P51">Просмотр переменных окружения</text:p>
      <text:p text:style-name="P52"/>
      <text:p text:style-name="P52"><draw:frame draw:style-name="fr2" draw:name="Изображение2" text:anchor-type="char" svg:width="17cm" svg:height="15.887cm" draw:z-index="0"><draw:image xlink:href="Pictures/10000001000003680000032FF2C529BC.png" xlink:type="simple" xlink:show="embed" xlink:actuate="onLoad" draw:mime-type="image/png"/></draw:frame></text:p>
      <text:p text:style-name="P52"/>
      <text:p text:style-name="P53"><text:span text:style-name="T3">Рисунок </text:span><text:span text:style-name="T8">2 </text:span><text:span text:style-name="T3">— </text:span><text:span text:style-name="T8">вывод переменных окружения</text:span></text:p>
      <text:p text:style-name="P50">Задание <text:span text:style-name="T5">3</text:span>.</text:p>
      <text:p text:style-name="P51"><text:soft-page-break/>Вывести в файл lab2.md значения переменных PATH, LANG, HOME</text:p>
      <text:p text:style-name="P52"/>
      <text:p text:style-name="P52"><draw:frame draw:style-name="fr1" draw:name="Изображение4" text:anchor-type="char" svg:width="17cm" svg:height="5.995cm" draw:z-index="2"><draw:image xlink:href="Pictures/10000001000003C100000153D85D3D5E.png" xlink:type="simple" xlink:show="embed" xlink:actuate="onLoad" draw:mime-type="image/png"/></draw:frame></text:p>
      <text:p text:style-name="P52"/>
      <text:p text:style-name="P53"><text:span text:style-name="T3">Рисунок </text:span><text:span text:style-name="T8">3</text:span><text:span text:style-name="T3"> — </text:span><text:span text:style-name="T8">вывод переменных</text:span></text:p>
      <text:p text:style-name="P50">Задание <text:span text:style-name="T5">4</text:span>.</text:p>
      <text:p text:style-name="P51">Посмотреть полученный файл при помощи less</text:p>
      <text:p text:style-name="P52"/>
      <text:p text:style-name="P52"><draw:frame draw:style-name="fr1" draw:name="Изображение5" text:anchor-type="char" svg:width="17cm" svg:height="5.376cm" draw:z-index="3"><draw:image xlink:href="Pictures/10000001000003C1000001302A266AAC.png" xlink:type="simple" xlink:show="embed" xlink:actuate="onLoad" draw:mime-type="image/png"/></draw:frame></text:p>
      <text:p text:style-name="P52"/>
      <text:p text:style-name="P53"><text:span text:style-name="T3">Рисунок </text:span><text:span text:style-name="T8">4</text:span><text:span text:style-name="T3"> — </text:span><text:span text:style-name="T8">просмотр фала</text:span></text:p>
      <text:p text:style-name="P50">Задание <text:span text:style-name="T5">5</text:span>.</text:p>
      <text:p text:style-name="P52">С<text:span text:style-name="T5">равните вывод date и LANG=C date</text:span></text:p>
      <text:p text:style-name="P52"/>
      <text:p text:style-name="P52"><draw:frame draw:style-name="fr3" draw:name="Изображение1" text:anchor-type="char" svg:width="6.639cm" svg:height="2.247cm" draw:z-index="4"><draw:image xlink:href="Pictures/10000001000000FB00000055D528CE0F.png" xlink:type="simple" xlink:show="embed" xlink:actuate="onLoad" draw:mime-type="image/png"/></draw:frame></text:p>
      <text:p text:style-name="P52"/>
      <text:p text:style-name="P53"><text:span text:style-name="T3">Рисунок </text:span><text:span text:style-name="T8">5</text:span><text:span text:style-name="T3"> — </text:span><text:span text:style-name="T8">сравнение выводов команд</text:span></text:p>
      <text:p text:style-name="P50">Задание <text:span text:style-name="T5">6.</text:span></text:p>
      <text:p text:style-name="P52">С<text:span text:style-name="T5">оздайте в домашней директори</text:span><text:span text:style-name="T9">и согласно индивидуального задания</text:span></text:p>
      <text:p text:style-name="P52"/>
      <text:p text:style-name="P52"/>
      <text:p text:style-name="P52"><draw:frame draw:style-name="fr1" draw:name="Изображение6" text:anchor-type="char" svg:width="17cm" svg:height="2.298cm" draw:z-index="5"><draw:image xlink:href="Pictures/10000001000002F900000067DDA9DC94.png" xlink:type="simple" xlink:show="embed" xlink:actuate="onLoad" draw:mime-type="image/png"/></draw:frame><text:soft-page-break/></text:p>
      <text:p text:style-name="P53"><text:span text:style-name="T3">Рисунок </text:span><text:span text:style-name="T8">6</text:span><text:span text:style-name="T3"> — </text:span><text:span text:style-name="T8">создание директорий</text:span></text:p>
      <text:p text:style-name="P50">Задание <text:span text:style-name="T9">8 - 9</text:span></text:p>
      <text:p text:style-name="P54">Добавить созданную директорию в PATH и проверить</text:p>
      <text:p text:style-name="P52"/>
      <text:p text:style-name="P52"><draw:frame draw:style-name="fr4" draw:name="Изображение7" text:anchor-type="char" svg:width="17cm" svg:height="5.526cm" draw:z-index="6"><draw:image xlink:href="Pictures/10000001000003A700000130B06D5440.png" xlink:type="simple" xlink:show="embed" xlink:actuate="onLoad" draw:mime-type="image/png"/></draw:frame></text:p>
      <text:p text:style-name="P53"><text:span text:style-name="T3">Рисунок </text:span><text:span text:style-name="T8">7 </text:span><text:span text:style-name="T3"><text:s/>— </text:span><text:span text:style-name="T8">добавление в path пути</text:span></text:p>
      <text:p text:style-name="P50">Задание <text:span text:style-name="T9">10</text:span>.</text:p>
      <text:p text:style-name="P52">С<text:span text:style-name="T9">оздайте в этой директории поддиректории согласно индивидуального задания. В первой поддиректории с содержимым текущей даты и времени</text:span></text:p>
      <text:p text:style-name="P52"/>
      <text:p text:style-name="P52"><draw:frame draw:style-name="fr3" draw:name="Изображение8" text:anchor-type="char" svg:width="11.296cm" svg:height="1.612cm" draw:z-index="7"><draw:image xlink:href="Pictures/10000001000001AB0000003D93AD3A1E.png" xlink:type="simple" xlink:show="embed" xlink:actuate="onLoad" draw:mime-type="image/png"/></draw:frame></text:p>
      <text:p text:style-name="P52"/>
      <text:p text:style-name="P53"><text:span text:style-name="T3">Рисунок </text:span><text:span text:style-name="T6">1</text:span><text:span text:style-name="T8">0</text:span><text:span text:style-name="T3"> — </text:span><text:span text:style-name="T7">Создание </text:span><text:span text:style-name="T8">поддиреторий</text:span></text:p>
      <text:p text:style-name="P50">Задание <text:span text:style-name="T9">11.</text:span></text:p>
      <text:p text:style-name="P55">Выведите рекурсивно список файлов домашней директории в файл отчета.</text:p>
      <text:p text:style-name="P52"/>
      <text:p text:style-name="P52"><draw:frame draw:style-name="fr3" draw:name="Изображение9" text:anchor-type="char" svg:width="11.296cm" svg:height="5.078cm" draw:z-index="8"><draw:image xlink:href="Pictures/10000001000001AB000000C073D58466.png" xlink:type="simple" xlink:show="embed" xlink:actuate="onLoad" draw:mime-type="image/png"/></draw:frame></text:p>
      <text:p text:style-name="P52"><text:soft-page-break/></text:p>
      <text:p text:style-name="P53"><text:span text:style-name="T3">Рисунок </text:span><text:span text:style-name="T6">1</text:span><text:span text:style-name="T3"> — </text:span><text:span text:style-name="T8">рекурсивный вывод</text:span></text:p>
      <text:p text:style-name="P50">Задание <text:span text:style-name="T10">12</text:span>.</text:p>
      <text:p text:style-name="P55">Создать в tmp директорию согласно индивидуального задания и скопировать созданные директории вместе с содержимым в нее</text:p>
      <text:p text:style-name="P52"/>
      <text:p text:style-name="P52"><draw:frame draw:style-name="fr1" draw:name="Изображение10" text:anchor-type="char" svg:width="17cm" svg:height="2.66cm" draw:z-index="9"><draw:image xlink:href="Pictures/10000001000002DF000000730C3B025C.png" xlink:type="simple" xlink:show="embed" xlink:actuate="onLoad" draw:mime-type="image/png"/></draw:frame></text:p>
      <text:p text:style-name="P53"><text:span text:style-name="T3">Рисунок </text:span><text:span text:style-name="T6">1</text:span><text:span text:style-name="T11">2</text:span><text:span text:style-name="T3"> — </text:span><text:span text:style-name="T11">создание в tmp директории</text:span></text:p>
      <text:p text:style-name="P50">Задание <text:span text:style-name="T10">13.</text:span></text:p>
      <text:p text:style-name="P55">Изучить find. Добавить в файл отчета все подкаталоги каталога /usr/share содержащие в своем имени сочетание букв ’ru’</text:p>
      <text:p text:style-name="P52"/>
      <text:p text:style-name="P52"><draw:frame draw:style-name="fr3" draw:name="Изображение11" text:anchor-type="char" svg:width="13.36cm" svg:height="13.333cm" draw:z-index="10"><draw:image xlink:href="Pictures/10000001000001F9000001F877C32550.png" xlink:type="simple" xlink:show="embed" xlink:actuate="onLoad" draw:mime-type="image/png"/></draw:frame></text:p>
      <text:p text:style-name="P52"/>
      <text:p text:style-name="P53"><text:span text:style-name="T3">Рисунок </text:span><text:span text:style-name="T6">1</text:span><text:span text:style-name="T11">3</text:span><text:span text:style-name="T3"> — </text:span><text:span text:style-name="T11">использование find</text:span></text:p>
      <text:p text:style-name="P50">Задание <text:span text:style-name="T12">14. </text:span></text:p>
      <text:p text:style-name="P56">Перенаправить в файл отчета всю информацию о системе</text:p>
      <text:p text:style-name="P52"><text:soft-page-break/></text:p>
      <text:p text:style-name="P52"><draw:frame draw:style-name="fr3" draw:name="Изображение12" text:anchor-type="char" svg:width="13.598cm" svg:height="0.924cm" draw:z-index="11"><draw:image xlink:href="Pictures/100000010000020200000023DF1F3291.png" xlink:type="simple" xlink:show="embed" xlink:actuate="onLoad" draw:mime-type="image/png"/></draw:frame></text:p>
      <text:p text:style-name="P53"><text:span text:style-name="T3">Рисунок </text:span><text:span text:style-name="T6">1</text:span><text:span text:style-name="T11">4</text:span><text:span text:style-name="T3"> — </text:span><text:span text:style-name="T11">вывод информации</text:span></text:p>
      <text:p text:style-name="P53"/>
      <text:p text:style-name="P53"><draw:frame draw:style-name="fr1" draw:name="Изображение13" text:anchor-type="char" svg:width="17cm" svg:height="10.964cm" draw:z-index="15"><draw:image xlink:href="Pictures/10000001000004DD00000323D8D297E1.png" xlink:type="simple" xlink:show="embed" xlink:actuate="onLoad" draw:mime-type="image/png"/></draw:frame></text:p>
      <text:p text:style-name="P57"><text:span text:style-name="T3">Рисунок </text:span><text:span text:style-name="T6">1</text:span><text:span text:style-name="T11">5</text:span><text:span text:style-name="T3"> — </text:span><text:span text:style-name="T11">просмотр файла</text:span></text:p>
      <text:p text:style-name="P58">Задание <text:span text:style-name="T12">15. </text:span></text:p>
      <text:p text:style-name="P56">Перенаправить в файл отчета время работы и нагрузку на систему</text:p>
      <text:p text:style-name="P59"/>
      <text:p text:style-name="P59"><draw:frame draw:style-name="fr3" draw:name="Изображение14" text:anchor-type="char" svg:width="7.486cm" svg:height="0.873cm" draw:z-index="16"><draw:image xlink:href="Pictures/100000010000011B0000002167B789BF.png" xlink:type="simple" xlink:show="embed" xlink:actuate="onLoad" draw:mime-type="image/png"/></draw:frame></text:p>
      <text:p text:style-name="P57"><text:span text:style-name="T3">Рисунок </text:span><text:span text:style-name="T6">1</text:span><text:span text:style-name="T11">6</text:span><text:span text:style-name="T3"> — </text:span><text:span text:style-name="T11">перенаправление даты в файл</text:span></text:p>
      <text:p text:style-name="P58">Задание <text:span text:style-name="T12">16. </text:span></text:p>
      <text:p text:style-name="P56">Используя vim заполнить информацию о файле <text:span text:style-name="T8">(номер, название, ФИО)</text:span></text:p>
      <text:p text:style-name="P59"/>
      <text:p text:style-name="P59"><draw:frame draw:style-name="fr5" draw:name="Изображение15" text:anchor-type="char" svg:width="10.984cm" svg:height="10.299cm" draw:z-index="17"><draw:image xlink:href="Pictures/1000000100000212000001F195540B0F.png" xlink:type="simple" xlink:show="embed" xlink:actuate="onLoad" draw:mime-type="image/png"/></draw:frame><text:soft-page-break/></text:p>
      <text:p text:style-name="P57"><text:span text:style-name="T3">Рисунок </text:span><text:span text:style-name="T6">1</text:span><text:span text:style-name="T11">7</text:span><text:span text:style-name="T3"> — </text:span><text:span text:style-name="T11">форматирование отчета</text:span></text:p>
      <text:p text:style-name="P58">Задание <text:span text:style-name="T12">1</text:span><text:span text:style-name="T8">7</text:span><text:span text:style-name="T12">. </text:span></text:p>
      <text:p text:style-name="P60">Отформатировать отчет</text:p>
      <text:p text:style-name="P59"><draw:frame draw:style-name="fr5" draw:name="Изображение16" text:anchor-type="char" svg:width="11.109cm" svg:height="11.007cm" draw:z-index="18"><draw:image xlink:href="Pictures/10000001000002EE000002E774BFE739.png" xlink:type="simple" xlink:show="embed" xlink:actuate="onLoad" draw:mime-type="image/png"/></draw:frame></text:p>
      <text:p text:style-name="P57"><text:span text:style-name="T3">Рисунок </text:span><text:span text:style-name="T6">1</text:span><text:span text:style-name="T11">8</text:span><text:span text:style-name="T3"> — </text:span><text:span text:style-name="T11">форматирование отчета</text:span></text:p>
      <text:p text:style-name="P58">Задание <text:span text:style-name="T12">1</text:span><text:span text:style-name="T8">8</text:span><text:span text:style-name="T12">. </text:span></text:p>
      <text:p text:style-name="P60"><text:soft-page-break/>Удалить каталоги, созданные при работе</text:p>
      <text:p text:style-name="P59"/>
      <text:p text:style-name="P59"><draw:frame draw:style-name="fr1" draw:name="Изображение17" text:anchor-type="char" svg:width="17cm" svg:height="1.655cm" draw:z-index="19"><draw:image xlink:href="Pictures/10000001000002EE0000004965C71661.png" xlink:type="simple" xlink:show="embed" xlink:actuate="onLoad" draw:mime-type="image/png"/></draw:frame></text:p>
      <text:p text:style-name="P57"><text:span text:style-name="T3">Рисунок </text:span><text:span text:style-name="T6">1</text:span><text:span text:style-name="T11">9</text:span><text:span text:style-name="T3"> — </text:span><text:span text:style-name="T11">удаление директорий</text:span></text:p>
      <text:p text:style-name="P61">Задание <text:span text:style-name="T12">1</text:span><text:span text:style-name="T8">9</text:span><text:span text:style-name="T12">. </text:span></text:p>
      <text:p text:style-name="P60">Вывести содержимое файла отчета на консоль</text:p>
      <text:p text:style-name="P60"><draw:frame draw:style-name="fr2" draw:name="Изображение18" text:anchor-type="char" svg:width="17cm" svg:height="20.962cm" draw:z-index="20"><draw:image xlink:href="Pictures/10000001000002880000031F4DEE657E.png" xlink:type="simple" xlink:show="embed" xlink:actuate="onLoad" draw:mime-type="image/png"/></draw:frame><text:soft-page-break/></text:p>
      <text:p text:style-name="P57"/>
      <text:p text:style-name="P57"><text:span text:style-name="T3">Рисунок </text:span><text:span text:style-name="T11">20</text:span><text:span text:style-name="T3"> — </text:span><text:span text:style-name="T11">просмотр отчета</text:span></text:p>
      <text:p text:style-name="P62">Задание <text:span text:style-name="T12">14. </text:span></text:p>
      <text:p text:style-name="P56">Перенаправить в файл отчета всю информацию о системе</text:p>
      <text:p text:style-name="P59"/>
      <text:p text:style-name="P59"><draw:frame draw:style-name="fr3" draw:name="Изображение12 Копия 5" text:anchor-type="char" svg:width="13.598cm" svg:height="0.924cm" draw:z-index="12"><draw:image xlink:href="Pictures/100000010000020200000023DF1F3291.png" xlink:type="simple" xlink:show="embed" xlink:actuate="onLoad" draw:mime-type="image/png"/></draw:frame></text:p>
      <text:p text:style-name="P57"><text:span text:style-name="T3">Рисунок </text:span><text:span text:style-name="T6">1</text:span><text:span text:style-name="T3"> — </text:span><text:span text:style-name="T7">Создание </text:span><text:span text:style-name="T4">директории</text:span></text:p>
      <text:p text:style-name="P62">Задание <text:span text:style-name="T12">14. </text:span></text:p>
      <text:p text:style-name="P56">Перенаправить в файл отчета всю информацию о системе</text:p>
      <text:p text:style-name="P59"/>
      <text:p text:style-name="P59"><draw:frame draw:style-name="fr3" draw:name="Изображение12 Копия 6" text:anchor-type="char" svg:width="13.598cm" svg:height="0.924cm" draw:z-index="13"><draw:image xlink:href="Pictures/100000010000020200000023DF1F3291.png" xlink:type="simple" xlink:show="embed" xlink:actuate="onLoad" draw:mime-type="image/png"/></draw:frame></text:p>
      <text:p text:style-name="P57"><text:span text:style-name="T3">Рисунок </text:span><text:span text:style-name="T6">1</text:span><text:span text:style-name="T3"> — </text:span><text:span text:style-name="T7">Создание </text:span><text:span text:style-name="T4">директории</text:span></text:p>
      <text:p text:style-name="P57"/>
      <text:p text:style-name="P57"><text:span text:style-name="T3">Рисунок </text:span><text:span text:style-name="T6">1</text:span><text:span text:style-name="T3"> — </text:span><text:span text:style-name="T7">Создание </text:span><text:span text:style-name="T4">директории</text:span></text:p>
      <text:p text:style-name="P62">Задание <text:span text:style-name="T12">14. </text:span></text:p>
      <text:p text:style-name="P56">Перенаправить в файл отчета всю информацию о системе</text:p>
      <text:p text:style-name="P59"/>
      <text:p text:style-name="P59"><draw:frame draw:style-name="fr3" draw:name="Изображение12 Копия 7" text:anchor-type="char" svg:width="13.598cm" svg:height="0.924cm" draw:z-index="14"><draw:image xlink:href="Pictures/100000010000020200000023DF1F3291.png" xlink:type="simple" xlink:show="embed" xlink:actuate="onLoad" draw:mime-type="image/png"/></draw:frame></text:p>
      <text:p text:style-name="P57"><text:span text:style-name="T3">Рисунок </text:span><text:span text:style-name="T6">1</text:span><text:span text:style-name="T3"> — </text:span><text:span text:style-name="T7">Создание </text:span><text:span text:style-name="T4">директории</text:span></text:p>
      <text:p text:style-name="P57"/>
      <text:p text:style-name="P57"><text:span text:style-name="T3">Рисунок </text:span><text:span text:style-name="T6">1</text:span><text:span text:style-name="T3"> — </text:span><text:span text:style-name="T7">Создание </text:span><text:span text:style-name="T4">директории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30%" fo:text-align="justify" style:justify-single-word="false" fo:orphans="0" fo:widows="0" fo:text-indent="1.27cm" style:auto-text-indent="false" fo:keep-with-next="always"/>
      <style:text-properties fo:color="#000000" loext:opacity="100%" fo:font-size="14pt" fo:language="none" fo:country="none" style:letter-kerning="true" style:font-size-asian="14pt" style:language-asian="none" style:country-asian="non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1:03.487222067</meta:creation-date>
    <meta:generator>LibreOffice/24.8.4.1$Linux_X86_64 LibreOffice_project/480$Build-1</meta:generator>
    <dc:date>2026-01-29T11:45:52.119079747</dc:date>
    <meta:editing-duration>PT58M2S</meta:editing-duration>
    <meta:editing-cycles>15</meta:editing-cycles>
    <meta:document-statistic meta:table-count="1" meta:image-count="21" meta:object-count="0" meta:page-count="12" meta:paragraph-count="97" meta:word-count="391" meta:character-count="2966" meta:non-whitespace-character-count="2610"/>
  </office:meta>
</office:document-meta>
</file>