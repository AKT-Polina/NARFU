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B00000335195BF7D8.png" manifest:media-type="image/png"/>
  <manifest:file-entry manifest:full-path="Pictures/10000001000001B100000021B3D293A8.png" manifest:media-type="image/png"/>
  <manifest:file-entry manifest:full-path="Pictures/10000001000001B10000032B01936F5A.png" manifest:media-type="image/png"/>
  <manifest:file-entry manifest:full-path="Pictures/100000010000015700000035E47ABAF3.png" manifest:media-type="image/png"/>
  <manifest:file-entry manifest:full-path="Pictures/100000010000018300000077ECAB32A6.png" manifest:media-type="image/png"/>
  <manifest:file-entry manifest:full-path="Pictures/10000001000001570000005BFE874444.png" manifest:media-type="image/png"/>
  <manifest:file-entry manifest:full-path="Pictures/100000010000009F0000030BFD3E8B6A.png" manifest:media-type="image/png"/>
  <manifest:file-entry manifest:full-path="Pictures/100000010000028F0000018BB8191F77.png" manifest:media-type="image/png"/>
  <manifest:file-entry manifest:full-path="Pictures/100000010000014900000011BBC252DE.png" manifest:media-type="image/png"/>
  <manifest:file-entry manifest:full-path="Pictures/100000010000022D00000044678801F9.png" manifest:media-type="image/png"/>
  <manifest:file-entry manifest:full-path="Pictures/100000010000022D00000025805B8033.png" manifest:media-type="image/png"/>
  <manifest:file-entry manifest:full-path="Pictures/100000010000022D0000004910DA1F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727cm" table:align="center" style:writing-mode="lr-tb"/>
    </style:style>
    <style:style style:name="Таблица1.A" style:family="table-column">
      <style:table-column-properties style:column-width="1.864cm"/>
    </style:style>
    <style:style style:name="Таблица1.B" style:family="table-column">
      <style:table-column-properties style:column-width="0.422cm"/>
    </style:style>
    <style:style style:name="Таблица1.C" style:family="table-column">
      <style:table-column-properties style:column-width="1.579cm"/>
    </style:style>
    <style:style style:name="Таблица1.D" style:family="table-column">
      <style:table-column-properties style:column-width="1cm"/>
    </style:style>
    <style:style style:name="Таблица1.E" style:family="table-column">
      <style:table-column-properties style:column-width="0.501cm"/>
    </style:style>
    <style:style style:name="Таблица1.F" style:family="table-column">
      <style:table-column-properties style:column-width="0.891cm"/>
    </style:style>
    <style:style style:name="Таблица1.G" style:family="table-column">
      <style:table-column-properties style:column-width="3.11cm"/>
    </style:style>
    <style:style style:name="Таблица1.H" style:family="table-column">
      <style:table-column-properties style:column-width="0.042cm"/>
    </style:style>
    <style:style style:name="Таблица1.J" style:family="table-column">
      <style:table-column-properties style:column-width="0.286cm"/>
    </style:style>
    <style:style style:name="Таблица1.K" style:family="table-column">
      <style:table-column-properties style:column-width="0.499cm"/>
    </style:style>
    <style:style style:name="Таблица1.L" style:family="table-column">
      <style:table-column-properties style:column-width="2.041cm"/>
    </style:style>
    <style:style style:name="Таблица1.M" style:family="table-column">
      <style:table-column-properties style:column-width="0.533cm"/>
    </style:style>
    <style:style style:name="Таблица1.N" style:family="table-column">
      <style:table-column-properties style:column-width="2.805cm"/>
    </style:style>
    <style:style style:name="Таблица1.O" style:family="table-column">
      <style:table-column-properties style:column-width="0.078cm"/>
    </style:style>
    <style:style style:name="Таблица1.P" style:family="table-column">
      <style:table-column-properties style:column-width="0.041cm"/>
    </style:style>
    <style:style style:name="Таблица1.Q" style:family="table-column">
      <style:table-column-properties style:column-width="0.381cm"/>
    </style:style>
    <style:style style:name="Таблица1.R" style:family="table-column">
      <style:table-column-properties style:column-width="0.649cm"/>
    </style:style>
    <style:style style:name="Таблица1.T" style:family="table-column">
      <style:table-column-properties style:column-width="0.164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R1" style:family="table-cell">
      <style:table-cell-properties fo:padding="0cm" fo:border="none"/>
    </style:style>
    <style:style style:name="Таблица1.B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R2" style:family="table-cell">
      <style:table-cell-properties fo:padding="0cm" fo:border="none"/>
    </style:style>
    <style:style style:name="Таблица1.R3" style:family="table-cell">
      <style:table-cell-properties fo:padding="0cm" fo:border="none"/>
    </style:style>
    <style:style style:name="Таблица1.R4" style:family="table-cell">
      <style:table-cell-properties fo:padding="0cm" fo:border="none"/>
    </style:style>
    <style:style style:name="Таблица1.R5" style:family="table-cell">
      <style:table-cell-properties fo:padding="0cm" fo:border="none"/>
    </style:style>
    <style:style style:name="Таблица1.R6" style:family="table-cell">
      <style:table-cell-properties fo:padding="0cm" fo:border="none"/>
    </style:style>
    <style:style style:name="Таблица1.R7" style:family="table-cell">
      <style:table-cell-properties fo:padding="0cm" fo:border="none"/>
    </style:style>
    <style:style style:name="Таблица1.8" style:family="table-row">
      <style:table-row-properties fo:keep-together="auto"/>
    </style:style>
    <style:style style:name="Таблица1.R8" style:family="table-cell">
      <style:table-cell-properties fo:padding="0cm" fo:border="none"/>
    </style:style>
    <style:style style:name="Таблица1.R9" style:family="table-cell">
      <style:table-cell-properties fo:padding="0cm" fo:border="none"/>
    </style:style>
    <style:style style:name="Таблица1.R10" style:family="table-cell">
      <style:table-cell-properties fo:padding="0cm" fo:border="none"/>
    </style:style>
    <style:style style:name="Таблица1.11" style:family="table-row">
      <style:table-row-properties style:min-row-height="0.601cm" fo:keep-together="auto"/>
    </style:style>
    <style:style style:name="Таблица1.R11" style:family="table-cell">
      <style:table-cell-properties fo:padding="0cm" fo:border="none"/>
    </style:style>
    <style:style style:name="Таблица1.B1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R12" style:family="table-cell">
      <style:table-cell-properties fo:padding="0cm" fo:border="none"/>
    </style:style>
    <style:style style:name="Таблица1.13" style:family="table-row">
      <style:table-row-properties style:min-row-height="0.637cm" fo:keep-together="auto"/>
    </style:style>
    <style:style style:name="Таблица1.R13" style:family="table-cell">
      <style:table-cell-properties fo:padding="0cm" fo:border="none"/>
    </style:style>
    <style:style style:name="Таблица1.R14" style:family="table-cell">
      <style:table-cell-properties fo:padding="0cm" fo:border="none"/>
    </style:style>
    <style:style style:name="Таблица1.15" style:family="table-row">
      <style:table-row-properties style:min-row-height="0.353cm" fo:keep-together="auto"/>
    </style:style>
    <style:style style:name="Таблица1.F15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R15" style:family="table-cell">
      <style:table-cell-properties fo:padding="0cm" fo:border="none"/>
    </style:style>
    <style:style style:name="Таблица1.R16" style:family="table-cell">
      <style:table-cell-properties fo:padding="0cm" fo:border="none"/>
    </style:style>
    <style:style style:name="Таблица1.S17" style:family="table-cell">
      <style:table-cell-properties fo:padding="0cm" fo:border="none"/>
    </style:style>
    <style:style style:name="Таблица1.S18" style:family="table-cell">
      <style:table-cell-properties fo:padding="0cm" fo:border="none"/>
    </style:style>
    <style:style style:name="Таблица1.S19" style:family="table-cell">
      <style:table-cell-properties fo:padding="0cm" fo:border="none"/>
    </style:style>
    <style:style style:name="Таблица1.S20" style:family="table-cell">
      <style:table-cell-properties fo:padding="0cm" fo:border="none"/>
    </style:style>
    <style:style style:name="Таблица1.R21" style:family="table-cell">
      <style:table-cell-properties fo:padding="0cm" fo:border="none"/>
    </style:style>
    <style:style style:name="Таблица1.S22" style:family="table-cell">
      <style:table-cell-properties fo:padding="0cm" fo:border="none"/>
    </style:style>
    <style:style style:name="Таблица1.S23" style:family="table-cell">
      <style:table-cell-properties fo:padding="0cm" fo:border="none"/>
    </style:style>
    <style:style style:name="Таблица1.24" style:family="table-row">
      <style:table-row-properties style:min-row-height="0.586cm" fo:keep-together="auto"/>
    </style:style>
    <style:style style:name="Таблица1.R24" style:family="table-cell">
      <style:table-cell-properties fo:padding="0cm" fo:border="none"/>
    </style:style>
    <style:style style:name="Таблица1.S26" style:family="table-cell">
      <style:table-cell-properties fo:padding="0cm" fo:border="none"/>
    </style:style>
    <style:style style:name="Таблица1.S29" style:family="table-cell">
      <style:table-cell-properties fo:padding="0cm" fo:border="none"/>
    </style:style>
    <style:style style:name="Таблица1.S30" style:family="table-cell">
      <style:table-cell-properties fo:padding="0cm" fo:border="none"/>
    </style:style>
    <style:style style:name="Таблица1.T31" style:family="table-cell">
      <style:table-cell-properties fo:padding="0cm" fo:border="none"/>
    </style:style>
    <style:style style:name="Таблица1.T32" style:family="table-cell">
      <style:table-cell-properties fo:padding="0cm" fo:border="none"/>
    </style:style>
    <style:style style:name="Таблица1.33" style:family="table-row">
      <style:table-row-properties style:row-height="2.866cm" fo:keep-together="auto"/>
    </style:style>
    <style:style style:name="Таблица1.T33" style:family="table-cell">
      <style:table-cell-properties fo:padding="0cm" fo:border="none"/>
    </style:style>
    <style:style style:name="Таблица1.R34" style:family="table-cell">
      <style:table-cell-properties fo:padding="0cm" fo:border="none"/>
    </style:style>
    <style:style style:name="Таблица1.R35" style:family="table-cell">
      <style:table-cell-properties fo:padding="0cm" fo:border="none"/>
    </style:style>
    <style:style style:name="P1" style:family="paragraph" style:parent-style-name="Standard">
      <style:paragraph-properties fo:margin-left="-0.042cm" fo:margin-right="0cm" style:line-height-at-least="0.423cm" fo:text-align="center" style:justify-single-word="false"/>
      <style:text-properties fo:text-transform="uppercase" fo:font-size="10pt" officeooo:paragraph-rsid="001d8260" style:font-size-asian="10pt"/>
    </style:style>
    <style:style style:name="P2" style:family="paragraph" style:parent-style-name="Standard">
      <style:paragraph-properties fo:margin-left="-0.042cm" fo:margin-right="0cm" style:line-height-at-least="0.423cm" fo:text-align="center" style:justify-single-word="false"/>
      <style:text-properties fo:font-size="11pt" officeooo:paragraph-rsid="001d8260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true" fo:text-align="center" style:justify-single-word="false"/>
      <style:text-properties officeooo:paragraph-rsid="001d8260"/>
    </style:style>
    <style:style style:name="P4" style:family="paragraph" style:parent-style-name="Standard">
      <style:paragraph-properties fo:margin-top="0cm" fo:margin-bottom="0cm" style:contextual-spacing="true" fo:text-align="center" style:justify-single-word="false"/>
      <style:text-properties fo:font-size="11pt" fo:font-weight="bold" officeooo:paragraph-rsid="001d8260" style:font-size-asian="11pt" style:font-weight-asian="bold" style:font-size-complex="11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3pt" officeooo:paragraph-rsid="001d8260" style:font-size-asian="13pt"/>
    </style:style>
    <style:style style:name="P6" style:family="paragraph" style:parent-style-name="Standard">
      <style:paragraph-properties style:snap-to-layout-grid="false"/>
      <style:text-properties fo:font-size="13pt" officeooo:paragraph-rsid="001d8260" style:font-size-asian="13pt"/>
    </style:style>
    <style:style style:name="P7" style:family="paragraph" style:parent-style-name="Standard">
      <style:paragraph-properties fo:text-align="center" style:justify-single-word="false" style:snap-to-layout-grid="false"/>
      <style:text-properties officeooo:paragraph-rsid="001d8260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1d8260" style:font-weight-asian="bold"/>
    </style:style>
    <style:style style:name="P9" style:family="paragraph" style:parent-style-name="Standard">
      <style:paragraph-properties style:snap-to-layout-grid="false"/>
      <style:text-properties officeooo:paragraph-rsid="001d8260"/>
    </style:style>
    <style:style style:name="P10" style:family="paragraph" style:parent-style-name="Standard">
      <style:paragraph-properties fo:text-align="center" style:justify-single-word="false"/>
      <style:text-properties fo:font-size="9pt" officeooo:paragraph-rsid="001d8260" style:font-size-asian="9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9pt" officeooo:paragraph-rsid="001d8260" style:font-size-asian="9pt"/>
    </style:style>
    <style:style style:name="P12" style:family="paragraph" style:parent-style-name="Heading_20_3">
      <style:paragraph-properties fo:margin-right="0cm" fo:text-align="center" style:justify-single-word="false" fo:text-indent="0.026cm" style:auto-text-indent="false"/>
      <style:text-properties fo:font-size="16pt" fo:font-weight="bold" officeooo:paragraph-rsid="001d8260" style:font-size-asian="16pt" style:font-weight-asian="bold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paragraph-rsid="001d8260" style:font-size-asian="16pt" style:font-weight-asian="bold" style:font-size-complex="16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6pt" fo:font-weight="bold" officeooo:paragraph-rsid="001d8260" style:font-size-asian="16pt" style:font-weight-asian="bold" style:font-size-complex="16pt"/>
    </style:style>
    <style:style style:name="P15" style:family="paragraph" style:parent-style-name="Heading_20_3">
      <style:paragraph-properties>
        <style:tab-stops>
          <style:tab-stop style:position="10.633cm"/>
        </style:tab-stops>
      </style:paragraph-properties>
      <style:text-properties officeooo:paragraph-rsid="001d8260"/>
    </style:style>
    <style:style style:name="P16" style:family="paragraph" style:parent-style-name="Standard">
      <style:paragraph-properties fo:text-align="justify" style:justify-single-word="false"/>
      <style:text-properties fo:font-size="13pt" officeooo:paragraph-rsid="001d8260" style:font-size-asian="13pt" style:font-size-complex="13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3pt" officeooo:paragraph-rsid="001d8260" style:font-size-asian="13pt" style:font-size-complex="13pt"/>
    </style:style>
    <style:style style:name="P18" style:family="paragraph" style:parent-style-name="Standard">
      <style:paragraph-properties fo:text-align="end" style:justify-single-word="false" style:snap-to-layout-grid="false"/>
      <style:text-properties officeooo:paragraph-rsid="001d8260"/>
    </style:style>
    <style:style style:name="P19" style:family="paragraph" style:parent-style-name="Standard">
      <style:paragraph-properties fo:margin-top="0.212cm" fo:margin-bottom="0cm" style:contextual-spacing="false" fo:text-align="center" style:justify-single-word="false"/>
      <style:text-properties officeooo:paragraph-rsid="001d8260"/>
    </style:style>
    <style:style style:name="P20" style:family="paragraph" style:parent-style-name="Standard">
      <style:paragraph-properties fo:margin-top="0.212cm" fo:margin-bottom="0cm" style:contextual-spacing="false" fo:text-align="center" style:justify-single-word="false" style:snap-to-layout-grid="false"/>
      <style:text-properties officeooo:paragraph-rsid="001d8260"/>
    </style:style>
    <style:style style:name="P21" style:family="paragraph" style:parent-style-name="Standard">
      <style:paragraph-properties fo:margin-top="0.212cm" fo:margin-bottom="0cm" style:contextual-spacing="false" style:snap-to-layout-grid="false"/>
      <style:text-properties officeooo:paragraph-rsid="001d8260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8pt" officeooo:paragraph-rsid="001d8260" style:font-size-asian="8pt"/>
    </style:style>
    <style:style style:name="P23" style:family="paragraph" style:parent-style-name="Standard">
      <style:text-properties officeooo:paragraph-rsid="001d8260"/>
    </style:style>
    <style:style style:name="P24" style:family="paragraph" style:parent-style-name="Standard">
      <style:paragraph-properties style:snap-to-layout-grid="false"/>
      <style:text-properties fo:font-size="8pt" officeooo:paragraph-rsid="001d8260" style:font-size-asian="8pt"/>
    </style:style>
    <style:style style:name="P25" style:family="paragraph" style:parent-style-name="Standard">
      <style:paragraph-properties>
        <style:tab-stops>
          <style:tab-stop style:position="7.826cm"/>
        </style:tab-stops>
      </style:paragraph-properties>
      <style:text-properties officeooo:paragraph-rsid="001d8260"/>
    </style:style>
    <style:style style:name="P26" style:family="paragraph" style:parent-style-name="Standard">
      <style:paragraph-properties fo:text-align="center" style:justify-single-word="false"/>
      <style:text-properties fo:font-size="8pt" officeooo:paragraph-rsid="001d8260" style:font-size-asian="8pt" style:font-size-complex="8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8pt" officeooo:paragraph-rsid="001d8260" style:font-size-asian="8pt" style:font-size-complex="8pt"/>
    </style:style>
    <style:style style:name="P28" style:family="paragraph" style:parent-style-name="Standard">
      <style:paragraph-properties>
        <style:tab-stops>
          <style:tab-stop style:position="4.519cm"/>
          <style:tab-stop style:position="4.962cm"/>
          <style:tab-stop style:position="7.844cm" style:type="center"/>
        </style:tab-stops>
      </style:paragraph-properties>
      <style:text-properties officeooo:paragraph-rsid="001d8260"/>
    </style:style>
    <style:style style:name="P29" style:family="paragraph" style:parent-style-name="Standard">
      <style:paragraph-properties>
        <style:tab-stops>
          <style:tab-stop style:position="1.713cm"/>
          <style:tab-stop style:position="7.844cm" style:type="center"/>
        </style:tab-stops>
      </style:paragraph-properties>
      <style:text-properties officeooo:paragraph-rsid="001d8260"/>
    </style:style>
    <style:style style:name="P30" style:family="paragraph" style:parent-style-name="Standard">
      <style:paragraph-properties style:snap-to-layout-grid="false">
        <style:tab-stops>
          <style:tab-stop style:position="4.519cm"/>
          <style:tab-stop style:position="4.962cm"/>
          <style:tab-stop style:position="7.844cm" style:type="center"/>
        </style:tab-stops>
      </style:paragraph-properties>
      <style:text-properties officeooo:paragraph-rsid="001d8260"/>
    </style:style>
    <style:style style:name="P31" style:family="paragraph" style:parent-style-name="Standard">
      <style:paragraph-properties style:snap-to-layout-grid="false">
        <style:tab-stops>
          <style:tab-stop style:position="1.713cm"/>
          <style:tab-stop style:position="7.844cm" style:type="center"/>
        </style:tab-stops>
      </style:paragraph-properties>
      <style:text-properties officeooo:paragraph-rsid="001d8260"/>
    </style:style>
    <style:style style:name="P32" style:family="paragraph" style:parent-style-name="Standard">
      <style:paragraph-properties>
        <style:tab-stops>
          <style:tab-stop style:position="3.722cm"/>
        </style:tab-stops>
      </style:paragraph-properties>
      <style:text-properties officeooo:paragraph-rsid="001d8260"/>
    </style:style>
    <style:style style:name="P33" style:family="paragraph" style:parent-style-name="Standard">
      <style:paragraph-properties>
        <style:tab-stops>
          <style:tab-stop style:position="2.392cm"/>
        </style:tab-stops>
      </style:paragraph-properties>
      <style:text-properties officeooo:paragraph-rsid="001d8260"/>
    </style:style>
    <style:style style:name="P34" style:family="paragraph" style:parent-style-name="Standard">
      <style:paragraph-properties>
        <style:tab-stops>
          <style:tab-stop style:position="3.634cm"/>
        </style:tab-stops>
      </style:paragraph-properties>
      <style:text-properties officeooo:paragraph-rsid="001d8260"/>
    </style:style>
    <style:style style:name="P35" style:family="paragraph" style:parent-style-name="Standard">
      <style:text-properties officeooo:paragraph-rsid="001d8260" style:font-size-complex="12pt"/>
    </style:style>
    <style:style style:name="P36" style:family="paragraph" style:parent-style-name="Standard">
      <style:paragraph-properties fo:text-align="center" style:justify-single-word="false" style:snap-to-layout-grid="false"/>
      <style:text-properties fo:font-size="9pt" officeooo:paragraph-rsid="001d8260" style:font-size-asian="9pt" style:font-size-complex="12pt"/>
    </style:style>
    <style:style style:name="P37" style:family="paragraph" style:parent-style-name="Standard">
      <style:paragraph-properties style:snap-to-layout-grid="false"/>
      <style:text-properties fo:font-size="9pt" officeooo:paragraph-rsid="001d8260" style:font-size-asian="9pt"/>
    </style:style>
    <style:style style:name="P38" style:family="paragraph" style:parent-style-name="Standard">
      <style:paragraph-properties fo:text-align="center" style:justify-single-word="false" style:snap-to-layout-grid="false"/>
      <style:text-properties officeooo:paragraph-rsid="001d8260" style:font-size-complex="12pt"/>
    </style:style>
    <style:style style:name="P39" style:family="paragraph" style:parent-style-name="Standard">
      <style:paragraph-properties>
        <style:tab-stops>
          <style:tab-stop style:position="4.195cm"/>
        </style:tab-stops>
      </style:paragraph-properties>
      <style:text-properties officeooo:paragraph-rsid="001d8260" style:font-size-complex="12pt"/>
    </style:style>
    <style:style style:name="P40" style:family="paragraph" style:parent-style-name="Standard">
      <style:paragraph-properties fo:text-align="center" style:justify-single-word="false" style:snap-to-layout-grid="false"/>
      <style:text-properties fo:font-size="9pt" fo:letter-spacing="-0.007cm" officeooo:paragraph-rsid="001d8260" style:font-size-asian="9pt"/>
    </style:style>
    <style:style style:name="P41" style:family="paragraph" style:parent-style-name="Standard">
      <style:text-properties fo:font-size="8pt" officeooo:paragraph-rsid="001d8260" style:font-size-asian="8pt" style:font-size-complex="8pt"/>
    </style:style>
    <style:style style:name="P42" style:family="paragraph" style:parent-style-name="Standard">
      <style:paragraph-properties style:snap-to-layout-grid="false"/>
      <style:text-properties fo:font-size="8pt" officeooo:paragraph-rsid="001d8260" style:font-size-asian="8pt" style:font-size-complex="8pt"/>
    </style:style>
    <style:style style:name="P43" style:family="paragraph" style:parent-style-name="Standard">
      <style:paragraph-properties>
        <style:tab-stops>
          <style:tab-stop style:position="0.797cm"/>
        </style:tab-stops>
      </style:paragraph-properties>
      <style:text-properties officeooo:paragraph-rsid="001d8260"/>
    </style:style>
    <style:style style:name="P44" style:family="paragraph" style:parent-style-name="Standard">
      <style:paragraph-properties>
        <style:tab-stops>
          <style:tab-stop style:position="0.355cm"/>
        </style:tab-stops>
      </style:paragraph-properties>
      <style:text-properties officeooo:paragraph-rsid="001d8260"/>
    </style:style>
    <style:style style:name="P45" style:family="paragraph" style:parent-style-name="Standard">
      <style:paragraph-properties fo:text-align="center" style:justify-single-word="false"/>
      <style:text-properties officeooo:paragraph-rsid="001d8260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font-weight="bold" officeooo:rsid="001d8260" officeooo:paragraph-rsid="001d8260" style:font-size-asian="14pt" style:font-weight-asian="bold" style:font-size-complex="14pt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1ea405" officeooo:paragraph-rsid="001ea405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rsid="001ccdce" officeooo:paragraph-rsid="001ea405" style:font-size-asian="14pt" style:font-size-complex="14pt"/>
    </style:style>
    <style:style style:name="P49" style:family="paragraph" style:parent-style-name="Standard" style:master-page-name="">
      <style:paragraph-properties fo:margin-left="0cm" fo:margin-right="0cm" fo:text-align="justify" style:justify-single-word="false" fo:text-indent="1.199cm" style:auto-text-indent="false" style:page-number="auto"/>
      <style:text-properties style:font-name="Times New Roman" fo:font-size="14pt" fo:font-weight="bold" officeooo:rsid="0024e88d" officeooo:paragraph-rsid="0024e88d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style:font-name="Times New Roman" fo:font-size="14pt" fo:font-weight="normal" officeooo:rsid="0024e88d" officeooo:paragraph-rsid="0024e88d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rsid="001ccdce" officeooo:paragraph-rsid="0024e88d" style:font-size-asian="14pt" style:font-size-complex="14pt"/>
    </style:style>
    <style:style style:name="P52" style:family="paragraph" style:parent-style-name="Standard" style:master-page-name="">
      <style:paragraph-properties fo:margin-left="0cm" fo:margin-right="0cm" fo:text-align="justify" style:justify-single-word="false" fo:text-indent="1.199cm" style:auto-text-indent="false" style:page-number="auto"/>
      <style:text-properties style:font-name="Times New Roman" fo:font-size="14pt" fo:font-weight="bold" officeooo:rsid="0024e88d" officeooo:paragraph-rsid="00264a1a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style:font-name="Times New Roman" fo:font-size="14pt" fo:font-weight="normal" officeooo:rsid="0024e88d" officeooo:paragraph-rsid="00264a1a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rsid="001ccdce" officeooo:paragraph-rsid="00264a1a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rsid="001ccdce" officeooo:paragraph-rsid="002785b0" style:font-size-asian="14pt" style:font-size-complex="14pt"/>
    </style:style>
    <style:style style:name="P56" style:family="paragraph" style:parent-style-name="Standard" style:master-page-name="">
      <style:paragraph-properties fo:margin-left="0cm" fo:margin-right="0cm" fo:text-align="justify" style:justify-single-word="false" fo:text-indent="1.199cm" style:auto-text-indent="false" style:page-number="auto"/>
      <style:text-properties style:font-name="Times New Roman" fo:font-size="14pt" fo:font-weight="bold" officeooo:rsid="0024e88d" officeooo:paragraph-rsid="002785b0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style:font-name="Times New Roman" fo:font-size="14pt" fo:font-weight="normal" officeooo:rsid="0024e88d" officeooo:paragraph-rsid="002785b0" style:font-size-asian="14pt" style:font-weight-asian="normal" style:font-size-complex="14pt" style:font-weight-complex="normal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1d8260"/>
    </style:style>
    <style:style style:name="T4" style:family="text">
      <style:text-properties officeooo:rsid="0024e88d"/>
    </style:style>
    <style:style style:name="T5" style:family="text">
      <style:text-properties officeooo:rsid="001ea405"/>
    </style:style>
    <style:style style:name="T6" style:family="text">
      <style:text-properties officeooo:rsid="001fa7e6"/>
    </style:style>
    <style:style style:name="T7" style:family="text">
      <style:text-properties officeooo:rsid="00264a1a"/>
    </style:style>
    <style:style style:name="T8" style:family="text">
      <style:text-properties officeooo:rsid="002785b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</text:p>
      <text:p text:style-name="P2">высшего образования</text:p>
      <text:p text:style-name="P3"><text:span text:style-name="T1">«Северный (Арктический) федеральный университет имени М.В. Ломоносова</text:span><text:span text:style-name="T2">»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B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B"/>
        <table:table-column table:style-name="Таблица1.T"/>
        <table:table-row table:style-name="Таблица1.1">
          <table:table-cell table:style-name="Таблица1.A1" table:number-columns-spanned="1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B2" table:number-columns-spanned="13" office:value-type="string">
            <text:p text:style-name="P8"><text:bookmark text:name="department"/>Институт судостроения и морской арктической техники (Севмашвтуз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10">(наименование высшей школы/ филиала/ института/ колледж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1"/>
          </table:table-cell>
          <table:covered-table-cell/>
          <table:covered-table-cell/>
          <table:table-cell table:style-name="Таблица1.R3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4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1"/>
          </table:table-cell>
          <table:covered-table-cell/>
          <table:covered-table-cell/>
          <table:table-cell table:style-name="Таблица1.R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14" office:value-type="string">
            <text:h text:style-name="P12" text:outline-level="3">ОТЧЕТ</text:h>
            <text:p text:style-name="P13">о лабораторном практикум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4"/>
          </table:table-cell>
          <table:covered-table-cell/>
          <table:covered-table-cell/>
          <table:table-cell table:style-name="Таблица1.R6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h text:style-name="P15" text:outline-level="3"><text:tab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7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A1" table:number-columns-spanned="14" office:value-type="string">
            <text:p text:style-name="P16">По дисциплине<text:bookmark text:name="displ_1"/> <text:span text:style-name="T3">Общепрофессиональный (модуль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7"/>
          </table:table-cell>
          <table:covered-table-cell/>
          <table:covered-table-cell/>
          <table:table-cell table:style-name="Таблица1.R8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B2" table:number-columns-spanned="7" office:value-type="string">
            <text:p text:style-name="P18"><text:bookmark text:name="displ_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9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B2" table:number-columns-spanned="14" office:value-type="string">
            <text:p text:style-name="P16">На тему <text:span text:style-name="T3">Установка Gite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7"/>
          </table:table-cell>
          <table:covered-table-cell/>
          <table:covered-table-cell/>
          <table:table-cell table:style-name="Таблица1.R10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1">
          <table:table-cell table:style-name="Таблица1.A1" table:number-columns-spanned="14" office:value-type="string">
            <text:p text:style-name="P19"><text:bookmark text:name="thema_1"/>______________________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0"/>
          </table:table-cell>
          <table:covered-table-cell/>
          <table:covered-table-cell/>
          <table:table-cell table:style-name="Таблица1.R1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1">
          <table:table-cell table:style-name="Таблица1.A1" office:value-type="string">
            <text:p text:style-name="P21"/>
          </table:table-cell>
          <table:table-cell table:style-name="Таблица1.B12" table:number-columns-spanned="1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0"/>
          </table:table-cell>
          <table:covered-table-cell/>
          <table:covered-table-cell/>
          <table:table-cell table:style-name="Таблица1.R1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3">
          <table:table-cell table:style-name="Таблица1.A1" office:value-type="string">
            <text:p text:style-name="P22"/>
          </table:table-cell>
          <table:table-cell table:style-name="Таблица1.A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Таблица1.A1" table:number-columns-spanned="9" office:value-type="string">
            <text:p text:style-name="P23"><text:bookmark text:name="thema_2"/>Выполнил (-а) обучающийся (-аяся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2"/>
          </table:table-cell>
          <table:covered-table-cell/>
          <table:covered-table-cell/>
          <table:table-cell table:style-name="Таблица1.R13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Таблица1.8"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B2" table:number-columns-spanned="9" office:value-type="string">
            <text:p text:style-name="P25"><text:bookmark text:name="thema_3"/><text:span text:style-name="T3">Абрамова Полина Александровна</text:span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14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5"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F15" table:number-columns-spanned="9" office:value-type="string">
            <text:p text:style-name="P26"><text:bookmark text:name="thema_4"/>(ФИО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7"/>
          </table:table-cell>
          <table:covered-table-cell/>
          <table:covered-table-cell/>
          <table:table-cell table:style-name="Таблица1.R1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9" office:value-type="string">
            <text:p text:style-name="P23">Направление подготовки / специальность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16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28"><text:tab/><text:tab/><text:tab/></text:p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10" office:value-type="string">
            <text:p text:style-name="P29"><text:span text:style-name="T3">09.03.02</text:span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17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18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32"><text:tab/>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26">(код и наименование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7"/>
          </table:table-cell>
          <table:covered-table-cell/>
          <table:covered-table-cell/>
          <table:table-cell table:style-name="Таблица1.S19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10" office:value-type="string">
            <text:p text:style-name="P33">Курс:<text:tab/><text:span text:style-name="T3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20" table:number-columns-spanned="2" office:value-type="string">
            <text:p text:style-name="P9"/>
          </table:table-cell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9" office:value-type="string">
            <text:p text:style-name="P34">Группа:<text:tab/><text:span text:style-name="T3">15331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2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22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35">Руководитель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36"/>
          </table:table-cell>
          <table:covered-table-cell/>
          <table:covered-table-cell/>
          <table:table-cell table:style-name="Таблица1.S23" table:number-columns-spanned="2" office:value-type="string">
            <text:p text:style-name="P37"/>
          </table:table-cell>
          <table:covered-table-cell/>
        </table:table-row>
        <table:table-row table:style-name="Таблица1.24">
          <table:table-cell table:style-name="Таблица1.A1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9" office:value-type="string">
            <text:p text:style-name="P39"><text:span text:style-name="T3">Ожигин Иван Сергеевич</text:span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36"/>
          </table:table-cell>
          <table:covered-table-cell/>
          <table:covered-table-cell/>
          <table:table-cell table:style-name="Таблица1.R24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27"><text:bookmark text:name="fio"/><text:bookmark text:name="status"/>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1" office:value-type="string">
            <text:p text:style-name="P26">(ФИО руководителя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Таблица1.8">
          <table:table-cell table:style-name="Таблица1.A1" table:number-columns-spanned="15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40"/>
          </table:table-cell>
          <table:covered-table-cell/>
          <table:covered-table-cell/>
          <table:table-cell table:style-name="Таблица1.S26" table:number-columns-spanned="2" office:value-type="string">
            <text:p text:style-name="P37"/>
          </table:table-cell>
          <table:covered-table-cell/>
        </table:table-row>
        <table:table-row table:style-name="Таблица1.8">
          <table:table-cell table:style-name="Таблица1.A1" table:number-columns-spanned="3" office:value-type="string">
            <text:p text:style-name="P23">Отметка о зачете</text:p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B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B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Таблица1.8"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6" office:value-type="string">
            <text:p text:style-name="P26">(отметка прописью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27"/>
          </table:table-cell>
          <table:table-cell table:style-name="Таблица1.A1" table:number-columns-spanned="5" office:value-type="string">
            <text:p text:style-name="P26">(дата)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Таблица1.8">
          <table:table-cell table:style-name="Таблица1.A1" table:number-columns-spanned="3" office:value-type="string">
            <text:p text:style-name="P23">Руководитель</text:p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B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B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29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F15" table:number-columns-spanned="6" office:value-type="string">
            <text:p text:style-name="P41"><text:s text:c="14"/>(подпись руководителя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27"/>
          </table:table-cell>
          <table:table-cell table:style-name="Таблица1.F15" table:number-columns-spanned="4" office:value-type="string">
            <text:p text:style-name="P26">(инициалы, фамилия)</text:p>
          </table:table-cell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42"/>
          </table:table-cell>
          <table:covered-table-cell/>
          <table:covered-table-cell/>
          <table:table-cell table:style-name="Таблица1.S30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9"/>
          </table:table-cell>
          <table:table-cell table:style-name="Таблица1.A1" table:number-columns-spanned="4" office:value-type="string">
            <text:p text:style-name="P43"><text:tab/></text:p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44"><text:tab/></text:p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T31" office:value-type="string">
            <text:p text:style-name="P9"/>
          </table:table-cell>
        </table:table-row>
        <table:table-row table:style-name="Таблица1.8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9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T32" office:value-type="string">
            <text:p text:style-name="P9"/>
          </table:table-cell>
        </table:table-row>
        <table:table-row table:style-name="Таблица1.33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9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  <text:p text:style-name="P45"/>
            <text:p text:style-name="P45"/>
            <text:p text:style-name="P45"/>
            <text:p text:style-name="P45"/>
            <text:p text:style-name="P45"/>
          </table:table-cell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T33" office:value-type="string">
            <text:p text:style-name="P9"/>
          </table:table-cell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9"/>
            <text:p text:style-name="P45"/>
            <text:p text:style-name="P45"><text:span text:style-name="T3">Архангельск</text:span> 20<text:span text:style-name="T3">2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34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7"><text:bookmark text:name="year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35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46"><text:soft-page-break/>Задание 1.</text:p>
      <text:p text:style-name="P47">Созда<text:span text:style-name="T4">ть директорию uwonzngs в домашней директории</text:span></text:p>
      <text:p text:style-name="P47"/>
      <text:p text:style-name="P47"><draw:frame draw:style-name="fr1" draw:name="Изображение1" text:anchor-type="char" svg:width="14.736cm" svg:height="1.931cm" draw:z-index="0"><draw:image xlink:href="Pictures/100000010000022D0000004910DA1F25.png" xlink:type="simple" xlink:show="embed" xlink:actuate="onLoad" draw:mime-type="image/png"/></draw:frame></text:p>
      <text:p text:style-name="P47"/>
      <text:p text:style-name="P48"><text:span text:style-name="T3">Рисунок </text:span><text:span text:style-name="T5">1</text:span><text:span text:style-name="T3"> — </text:span><text:span text:style-name="T6">Создание </text:span><text:span text:style-name="T4">директории</text:span></text:p>
      <text:p text:style-name="P48"/>
      <text:p text:style-name="P49">Задание 2</text:p>
      <text:p text:style-name="P50">создать подкаталоги rslksoll и xzbipeub</text:p>
      <text:p text:style-name="P50"><draw:frame draw:style-name="fr1" draw:name="Изображение2" text:anchor-type="char" svg:width="14.736cm" svg:height="1.797cm" draw:z-index="1"><draw:image xlink:href="Pictures/100000010000022D00000044678801F9.png" xlink:type="simple" xlink:show="embed" xlink:actuate="onLoad" draw:mime-type="image/png"/></draw:frame></text:p>
      <text:p text:style-name="P51"><text:span text:style-name="T3">Рисунок </text:span><text:span text:style-name="T5">1</text:span><text:span text:style-name="T3"> — </text:span><text:span text:style-name="T6">Создание </text:span><text:span text:style-name="T4">директории</text:span></text:p>
      <text:p text:style-name="P49">Задание <text:span text:style-name="T7">3</text:span></text:p>
      <text:p text:style-name="P50">варвыржащшрщвжы</text:p>
      <text:p text:style-name="P50"><draw:frame draw:style-name="fr1" draw:name="Изображение3" text:anchor-type="char" svg:width="14.736cm" svg:height="0.977cm" draw:z-index="2"><draw:image xlink:href="Pictures/100000010000022D00000025805B8033.png" xlink:type="simple" xlink:show="embed" xlink:actuate="onLoad" draw:mime-type="image/png"/></draw:frame></text:p>
      <text:p text:style-name="P51"><text:span text:style-name="T3">Рисунок </text:span><text:span text:style-name="T5">1</text:span><text:span text:style-name="T3"> — </text:span><text:span text:style-name="T6">Создание </text:span><text:span text:style-name="T4">директории</text:span></text:p>
      <text:p text:style-name="P49">Задание <text:span text:style-name="T7">4</text:span></text:p>
      <text:p text:style-name="P50">варвыржащшрщвжы</text:p>
      <text:p text:style-name="P50"><draw:frame draw:style-name="fr1" draw:name="Изображение4" text:anchor-type="char" svg:width="8.703cm" svg:height="0.45cm" draw:z-index="3"><draw:image xlink:href="Pictures/100000010000014900000011BBC252DE.png" xlink:type="simple" xlink:show="embed" xlink:actuate="onLoad" draw:mime-type="image/png"/></draw:frame></text:p>
      <text:p text:style-name="P51"><draw:frame draw:style-name="fr2" draw:name="Изображение5" text:anchor-type="char" svg:width="4.207cm" svg:height="20.608cm" draw:z-index="4"><draw:image xlink:href="Pictures/100000010000009F0000030BFD3E8B6A.png" xlink:type="simple" xlink:show="embed" xlink:actuate="onLoad" draw:mime-type="image/png"/></draw:frame><text:soft-page-break/></text:p>
      <text:p text:style-name="P51"><text:span text:style-name="T3">Рисунок </text:span><text:span text:style-name="T5">1</text:span><text:span text:style-name="T3"> — </text:span><text:span text:style-name="T6">Создание </text:span><text:span text:style-name="T4">директории</text:span></text:p>
      <text:p text:style-name="P49">Задание <text:span text:style-name="T7">5</text:span></text:p>
      <text:p text:style-name="P50">варвыржащшрщвжы</text:p>
      <text:p text:style-name="P50"><draw:frame draw:style-name="fr3" draw:name="Изображение6" text:anchor-type="char" svg:width="10.238cm" svg:height="3.149cm" draw:z-index="5"><draw:image xlink:href="Pictures/100000010000018300000077ECAB32A6.png" xlink:type="simple" xlink:show="embed" xlink:actuate="onLoad" draw:mime-type="image/png"/></draw:frame><text:soft-page-break/></text:p>
      <text:p text:style-name="P51"><text:span text:style-name="T3">Рисунок </text:span><text:span text:style-name="T5">1</text:span><text:span text:style-name="T3"> — </text:span><text:span text:style-name="T6">Создание </text:span><text:span text:style-name="T4">директории</text:span></text:p>
      <text:p text:style-name="P49">Задание <text:span text:style-name="T8">6</text:span></text:p>
      <text:p text:style-name="P50">варвыржащшрщвжы</text:p>
      <text:p text:style-name="P50"><draw:frame draw:style-name="fr3" draw:name="Изображение7" text:anchor-type="char" svg:width="9.073cm" svg:height="2.408cm" draw:z-index="6"><draw:image xlink:href="Pictures/10000001000001570000005BFE874444.png" xlink:type="simple" xlink:show="embed" xlink:actuate="onLoad" draw:mime-type="image/png"/></draw:frame></text:p>
      <text:p text:style-name="P51"><text:span text:style-name="T3">Рисунок </text:span><text:span text:style-name="T5">1</text:span><text:span text:style-name="T3"> — </text:span><text:span text:style-name="T6">Создание </text:span><text:span text:style-name="T4">директории</text:span></text:p>
      <text:p text:style-name="P49">Задание <text:span text:style-name="T8">7</text:span></text:p>
      <text:p text:style-name="P50">варвыржащшрщвжы</text:p>
      <text:p text:style-name="P50"><draw:frame draw:style-name="fr3" draw:name="Изображение8" text:anchor-type="char" svg:width="9.073cm" svg:height="1.402cm" draw:z-index="7"><draw:image xlink:href="Pictures/100000010000015700000035E47ABAF3.png" xlink:type="simple" xlink:show="embed" xlink:actuate="onLoad" draw:mime-type="image/png"/></draw:frame></text:p>
      <text:p text:style-name="P51"><text:span text:style-name="T3">Рисунок </text:span><text:span text:style-name="T5">1</text:span><text:span text:style-name="T3"> — </text:span><text:span text:style-name="T6">Создание </text:span><text:span text:style-name="T4">директории</text:span></text:p>
      <text:p text:style-name="P52">Задание <text:span text:style-name="T8">8</text:span></text:p>
      <text:p text:style-name="P53">варвыржащшрщвжы</text:p>
      <text:p text:style-name="P53"><draw:frame draw:style-name="fr2" draw:name="Изображение9" text:anchor-type="char" svg:width="11.455cm" svg:height="21.454cm" draw:z-index="8"><draw:image xlink:href="Pictures/10000001000001B10000032B01936F5A.png" xlink:type="simple" xlink:show="embed" xlink:actuate="onLoad" draw:mime-type="image/png"/></draw:frame><text:soft-page-break/></text:p>
      <text:p text:style-name="P54"><text:span text:style-name="T3">Рисунок </text:span><text:span text:style-name="T5">1</text:span><text:span text:style-name="T3"> — </text:span><text:span text:style-name="T6">Создание </text:span><text:span text:style-name="T4">директории</text:span></text:p>
      <text:p text:style-name="P52">Задание <text:span text:style-name="T8">9</text:span></text:p>
      <text:p text:style-name="P53">варвыржащшрщвжы</text:p>
      <text:p text:style-name="P53"><draw:frame draw:style-name="fr3" draw:name="Изображение10" text:anchor-type="char" svg:width="11.455cm" svg:height="0.873cm" draw:z-index="9"><draw:image xlink:href="Pictures/10000001000001B100000021B3D293A8.png" xlink:type="simple" xlink:show="embed" xlink:actuate="onLoad" draw:mime-type="image/png"/></draw:frame></text:p>
      <text:p text:style-name="P54"><text:soft-page-break/><text:span text:style-name="T3">Рисунок </text:span><text:span text:style-name="T5">1</text:span><text:span text:style-name="T3"> — </text:span><text:span text:style-name="T6">Создание </text:span><text:span text:style-name="T4">директории</text:span></text:p>
      <text:p text:style-name="P55"><draw:frame draw:style-name="fr3" draw:name="Изображение11" text:anchor-type="char" svg:width="11.719cm" svg:height="21.719cm" draw:z-index="10"><draw:image xlink:href="Pictures/10000001000001BB00000335195BF7D8.png" xlink:type="simple" xlink:show="embed" xlink:actuate="onLoad" draw:mime-type="image/png"/></draw:frame><text:span text:style-name="T3">Рисунок </text:span><text:span text:style-name="T5">1</text:span><text:span text:style-name="T3"> — </text:span><text:span text:style-name="T6">Создание </text:span><text:span text:style-name="T4">директории</text:span></text:p>
      <text:p text:style-name="P52">Задание <text:span text:style-name="T8">10</text:span></text:p>
      <text:p text:style-name="P53">варвыржащшрщвжы</text:p>
      <text:p text:style-name="P53"><draw:frame draw:style-name="fr4" draw:name="Изображение12" text:anchor-type="char" svg:width="17cm" svg:height="10.25cm" draw:z-index="11"><draw:image xlink:href="Pictures/100000010000028F0000018BB8191F77.png" xlink:type="simple" xlink:show="embed" xlink:actuate="onLoad" draw:mime-type="image/png"/></draw:frame><text:soft-page-break/></text:p>
      <text:p text:style-name="P54"><text:span text:style-name="T3">Рисунок </text:span><text:span text:style-name="T5">1</text:span><text:span text:style-name="T3"> — </text:span><text:span text:style-name="T6">Создание </text:span><text:span text:style-name="T4">директории</text:span></text:p>
      <text:p text:style-name="P52">Задание <text:span text:style-name="T8">11</text:span></text:p>
      <text:p text:style-name="P53">варвыржащшрщвжы</text:p>
      <text:p text:style-name="P53"/>
      <text:p text:style-name="P54"><text:span text:style-name="T3">Рисунок </text:span><text:span text:style-name="T5">1</text:span><text:span text:style-name="T3"> — </text:span><text:span text:style-name="T6">Создание </text:span><text:span text:style-name="T4">директории</text:span></text:p>
      <text:p text:style-name="P56">Задание 2</text:p>
      <text:p text:style-name="P57">варвыржащшрщвжы</text:p>
      <text:p text:style-name="P57"/>
      <text:p text:style-name="P55"><text:span text:style-name="T3">Рисунок </text:span><text:span text:style-name="T5">1</text:span><text:span text:style-name="T3"> — </text:span><text:span text:style-name="T6">Создание </text:span><text:span text:style-name="T4">директории</text:span></text:p>
      <text:p text:style-name="P56">Задание 2</text:p>
      <text:p text:style-name="P57">варвыржащшрщвжы</text:p>
      <text:p text:style-name="P57"/>
      <text:p text:style-name="P55"><text:span text:style-name="T3">Рисунок </text:span><text:span text:style-name="T5">1</text:span><text:span text:style-name="T3"> — </text:span><text:span text:style-name="T6">Создание </text:span><text:span text:style-name="T4">директории</text:span></text:p>
      <text:p text:style-name="P56">Задание 2</text:p>
      <text:p text:style-name="P57">варвыржащшрщвжы</text:p>
      <text:p text:style-name="P57"/>
      <text:p text:style-name="P55"><text:span text:style-name="T3">Рисунок </text:span><text:span text:style-name="T5">1</text:span><text:span text:style-name="T3"> — </text:span><text:span text:style-name="T6">Создание </text:span><text:span text:style-name="T4">директории</text:span></text:p>
      <text:p text:style-name="P56">Задание 2</text:p>
      <text:p text:style-name="P57">варвыржащшрщвжы</text:p>
      <text:p text:style-name="P57"/>
      <text:p text:style-name="P55"><text:span text:style-name="T3">Рисунок </text:span><text:span text:style-name="T5">1</text:span><text:span text:style-name="T3"> — </text:span><text:span text:style-name="T6">Создание </text:span><text:span text:style-name="T4">директории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30%" fo:text-align="justify" style:justify-single-word="false" fo:orphans="0" fo:widows="0" fo:text-indent="1.27cm" style:auto-text-indent="false" fo:keep-with-next="always"/>
      <style:text-properties fo:color="#000000" loext:opacity="100%" fo:font-size="14pt" fo:language="none" fo:country="none" style:letter-kerning="true" style:font-size-asian="14pt" style:language-asian="none" style:country-asian="non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41:03.487222067</meta:creation-date>
    <meta:generator>LibreOffice/24.8.4.1$Linux_X86_64 LibreOffice_project/480$Build-1</meta:generator>
    <dc:date>2026-01-29T10:45:49.332399624</dc:date>
    <meta:editing-duration>PT42M54S</meta:editing-duration>
    <meta:editing-cycles>13</meta:editing-cycles>
    <meta:document-statistic meta:table-count="1" meta:image-count="12" meta:object-count="0" meta:page-count="7" meta:paragraph-count="80" meta:word-count="204" meta:character-count="1763" meta:non-whitespace-character-count="1594"/>
  </office:meta>
</office:document-meta>
</file>