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7cc3e" officeooo:paragraph-rsid="0017cc3e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189d27" officeooo:paragraph-rsid="00189d27"/>
    </style:style>
    <style:style style:name="P3" style:family="paragraph" style:parent-style-name="Standard">
      <style:text-properties officeooo:rsid="0019ba57" officeooo:paragraph-rsid="0019ba57"/>
    </style:style>
    <style:style style:name="P4" style:family="paragraph" style:parent-style-name="Standard">
      <style:text-properties officeooo:rsid="001babc9" officeooo:paragraph-rsid="001d13c2"/>
    </style:style>
    <style:style style:name="P5" style:family="paragraph" style:parent-style-name="Standard">
      <style:text-properties officeooo:rsid="001babc9" officeooo:paragraph-rsid="001babc9"/>
    </style:style>
    <style:style style:name="P6" style:family="paragraph" style:parent-style-name="Standard">
      <style:text-properties officeooo:rsid="001d13c2" officeooo:paragraph-rsid="001d13c2"/>
    </style:style>
    <style:style style:name="T1" style:family="text">
      <style:text-properties officeooo:rsid="0019ba57"/>
    </style:style>
    <style:style style:name="T2" style:family="text">
      <style:text-properties officeooo:rsid="001babc9"/>
    </style:style>
    <style:style style:name="T3" style:family="text">
      <style:text-properties officeooo:rsid="001d13c2"/>
    </style:style>
    <style:style style:name="T4" style:family="text">
      <style:text-properties officeooo:rsid="001ea2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инопрокат (ассортимент и работа с клиентами)</text:p>
      <text:p text:style-name="P2"/>
      <text:p text:style-name="P2">Субъект Алиса</text:p>
      <text:p text:style-name="P2">Ф1 = субъект хочет взять фильм</text:p>
      <text:p text:style-name="P2">Ф2 = у субъекта есть достаточно денег</text:p>
      <text:p text:style-name="P2">Ф3 = субъект выбрал фильм</text:p>
      <text:p text:style-name="P2">Ф4 = фильм есть в кинопрокате</text:p>
      <text:p text:style-name="P2">Ф5 = субъект сдал ранее взятый фильм</text:p>
      <text:p text:style-name="P2"/>
      <text:p text:style-name="P2">Д1 = субъект может пойти в кинопроката</text:p>
      <text:p text:style-name="P2">Д2 = у субъекта принимает заказ работник</text:p>
      <text:p text:style-name="P2">Д3 = <text:span text:style-name="T1">фильм выносят </text:span><text:span text:style-name="T2">субъекту</text:span></text:p>
      <text:p text:style-name="P3">Д4 <text:span text:style-name="T2">= субъект должен оплатить фильм</text:span></text:p>
      <text:p text:style-name="P4">Д5 = субъект должен отдать ранее взятый фильм</text:p>
      <text:p text:style-name="P5"/>
      <text:p text:style-name="P5"/>
      <text:p text:style-name="P5">П1 = <text:span text:style-name="T3">4 </text:span>Ф1 и Ф2 = Д1</text:p>
      <text:p text:style-name="P5">П2 = <text:span text:style-name="T3">3 </text:span>Ф3 и Ф5 = Д2</text:p>
      <text:p text:style-name="P5">П3 = <text:span text:style-name="T3">2 </text:span>Д2 и Ф4 = Д3</text:p>
      <text:p text:style-name="P5">П4 = <text:span text:style-name="T3">2 </text:span>Д2 и неФ4 = Д<text:span text:style-name="T3">5</text:span></text:p>
      <text:p text:style-name="P6">П6 = <text:span text:style-name="T4">1 Ф2</text:span> и <text:span text:style-name="T4">Д3</text:span> = Д4</text:p>
      <text:p text:style-name="P6">П7 = 3 Ф5 и Ф2 = Д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3T11:01:45.864323960</meta:creation-date>
    <dc:date>2026-01-23T11:47:48.972371812</dc:date>
    <meta:editing-duration>PT18M2S</meta:editing-duration>
    <meta:editing-cycles>5</meta:editing-cycles>
    <meta:generator>LibreOffice/24.8.4.1$Linux_X86_64 LibreOffice_project/480$Build-1</meta:generator>
    <meta:document-statistic meta:table-count="0" meta:image-count="0" meta:object-count="0" meta:page-count="1" meta:paragraph-count="18" meta:word-count="120" meta:character-count="515" meta:non-whitespace-character-count="413"/>
  </office:meta>
</office:document-meta>
</file>