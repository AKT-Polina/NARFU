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4039FC7F928.png" manifest:media-type="image/png"/>
  <manifest:file-entry manifest:full-path="Pictures/1000000100000A00000002485B0EF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1856ed" officeooo:paragraph-rsid="001856ed"/>
    </style:style>
    <style:style style:name="P2" style:family="paragraph" style:parent-style-name="Standard">
      <style:text-properties fo:font-weight="bold" officeooo:rsid="001856ed" officeooo:paragraph-rsid="001856ed" style:font-weight-asian="bold" style:font-weight-complex="bold"/>
    </style:style>
    <style:style style:name="P3" style:family="paragraph" style:parent-style-name="Standard">
      <style:text-properties fo:font-weight="bold" officeooo:rsid="001cb073" officeooo:paragraph-rsid="001cb073" style:font-weight-asian="bold" style:font-weight-complex="bold"/>
    </style:style>
    <style:style style:name="P4" style:family="paragraph" style:parent-style-name="Standard">
      <style:text-properties officeooo:rsid="0021be9c" officeooo:paragraph-rsid="002ff78c"/>
    </style:style>
    <style:style style:name="P5" style:family="paragraph" style:parent-style-name="Standard">
      <style:text-properties officeooo:rsid="00204220" officeooo:paragraph-rsid="00204220"/>
    </style:style>
    <style:style style:name="P6" style:family="paragraph" style:parent-style-name="Standard">
      <style:text-properties fo:font-weight="bold" officeooo:rsid="00224e3d" officeooo:paragraph-rsid="00224e3d" style:font-weight-asian="bold" style:font-weight-complex="bold"/>
    </style:style>
    <style:style style:name="P7" style:family="paragraph" style:parent-style-name="Standard" style:list-style-name="L1">
      <style:text-properties fo:font-weight="normal" officeooo:rsid="00224e3d" officeooo:paragraph-rsid="00224e3d" style:font-weight-asian="normal" style:font-weight-complex="normal"/>
    </style:style>
    <style:style style:name="P8" style:family="paragraph" style:parent-style-name="Standard">
      <style:text-properties fo:font-weight="bold" officeooo:rsid="00204220" officeooo:paragraph-rsid="00204220" style:font-weight-asian="bold" style:font-weight-complex="bold"/>
    </style:style>
    <style:style style:name="P9" style:family="paragraph" style:parent-style-name="Standard" style:list-style-name="L2">
      <style:text-properties officeooo:rsid="0021d21b" officeooo:paragraph-rsid="0021d21b"/>
    </style:style>
    <style:style style:name="P10" style:family="paragraph" style:parent-style-name="Standard" style:list-style-name="L2">
      <style:text-properties officeooo:rsid="00224e3d" officeooo:paragraph-rsid="00224e3d"/>
    </style:style>
    <style:style style:name="P11" style:family="paragraph" style:parent-style-name="Standard" style:list-style-name="L2">
      <style:text-properties officeooo:rsid="00235f3f" officeooo:paragraph-rsid="00235f3f"/>
    </style:style>
    <style:style style:name="P12" style:family="paragraph" style:parent-style-name="Standard" style:list-style-name="L2">
      <style:text-properties officeooo:rsid="0020582d" officeooo:paragraph-rsid="00235f3f"/>
    </style:style>
    <style:style style:name="P13" style:family="paragraph" style:parent-style-name="Standard">
      <style:text-properties officeooo:rsid="00224e3d" officeooo:paragraph-rsid="00224e3d"/>
    </style:style>
    <style:style style:name="P14" style:family="paragraph" style:parent-style-name="Standard">
      <style:text-properties fo:font-weight="bold" officeooo:rsid="00273ce0" officeooo:paragraph-rsid="00273ce0" style:font-weight-asian="bold" style:font-weight-complex="bold"/>
    </style:style>
    <style:style style:name="P15" style:family="paragraph" style:parent-style-name="Standard">
      <style:text-properties fo:font-weight="normal" officeooo:rsid="00273ce0" officeooo:paragraph-rsid="00273ce0" style:font-weight-asian="normal" style:font-weight-complex="normal"/>
    </style:style>
    <style:style style:name="P16" style:family="paragraph" style:parent-style-name="Standard">
      <style:text-properties fo:font-weight="normal" officeooo:rsid="0028a662" officeooo:paragraph-rsid="0028a662" style:font-weight-asian="normal" style:font-weight-complex="normal"/>
    </style:style>
    <style:style style:name="P17" style:family="paragraph" style:parent-style-name="Standard">
      <style:text-properties fo:font-weight="bold" officeooo:rsid="0028a662" officeooo:paragraph-rsid="0028a662" style:font-weight-asian="bold" style:font-weight-complex="bold"/>
    </style:style>
    <style:style style:name="P18" style:family="paragraph" style:parent-style-name="Standard" style:list-style-name="L3">
      <style:text-properties officeooo:rsid="001e5f52" officeooo:paragraph-rsid="002a465a"/>
    </style:style>
    <style:style style:name="P19" style:family="paragraph" style:parent-style-name="Standard" style:list-style-name="L3">
      <style:text-properties officeooo:rsid="001e5f52" officeooo:paragraph-rsid="002ea686"/>
    </style:style>
    <style:style style:name="P20" style:family="paragraph" style:parent-style-name="Standard" style:list-style-name="L3">
      <style:text-properties officeooo:rsid="00204220" officeooo:paragraph-rsid="002a465a"/>
    </style:style>
    <style:style style:name="P21" style:family="paragraph" style:parent-style-name="Standard" style:list-style-name="L3">
      <style:text-properties officeooo:paragraph-rsid="002a465a"/>
    </style:style>
    <style:style style:name="P22" style:family="paragraph" style:parent-style-name="Standard" style:list-style-name="L3">
      <style:text-properties officeooo:rsid="0020582d" officeooo:paragraph-rsid="002a465a"/>
    </style:style>
    <style:style style:name="P23" style:family="paragraph" style:parent-style-name="Standard" style:list-style-name="L3">
      <style:text-properties officeooo:rsid="0020c97b" officeooo:paragraph-rsid="002a465a"/>
    </style:style>
    <style:style style:name="P24" style:family="paragraph" style:parent-style-name="Standard" style:list-style-name="L3">
      <style:text-properties officeooo:rsid="0021be9c" officeooo:paragraph-rsid="002a465a"/>
    </style:style>
    <style:style style:name="P25" style:family="paragraph" style:parent-style-name="Standard">
      <style:paragraph-properties fo:break-before="page"/>
      <style:text-properties fo:font-weight="bold" officeooo:rsid="0025c57a" officeooo:paragraph-rsid="0025c57a" style:font-weight-asian="bold" style:font-weight-complex="bold"/>
    </style:style>
    <style:style style:name="T1" style:family="text">
      <style:text-properties officeooo:rsid="0021be9c"/>
    </style:style>
    <style:style style:name="T2" style:family="text">
      <style:text-properties officeooo:rsid="00307c78"/>
    </style:style>
    <style:style style:name="T3" style:family="text">
      <style:text-properties officeooo:rsid="001cb073"/>
    </style:style>
    <style:style style:name="T4" style:family="text">
      <style:text-properties officeooo:rsid="001a9a4d"/>
    </style:style>
    <style:style style:name="T5" style:family="text">
      <style:text-properties officeooo:rsid="001bc7a1"/>
    </style:style>
    <style:style style:name="T6" style:family="text">
      <style:text-properties officeooo:rsid="00224e3d"/>
    </style:style>
    <style:style style:name="T7" style:family="text">
      <style:text-properties officeooo:rsid="00235f3f"/>
    </style:style>
    <style:style style:name="T8" style:family="text">
      <style:text-properties officeooo:rsid="0025c57a"/>
    </style:style>
    <style:style style:name="T9" style:family="text">
      <style:text-properties officeooo:rsid="002ff78c"/>
    </style:style>
    <style:style style:name="T10" style:family="text">
      <style:text-properties officeooo:rsid="002a465a"/>
    </style:style>
    <style:style style:name="T11" style:family="text">
      <style:text-properties officeooo:rsid="002ea686"/>
    </style:style>
    <style:style style:name="T12" style:family="text">
      <style:text-properties officeooo:rsid="0020582d"/>
    </style:style>
    <style:style style:name="T13" style:family="text">
      <style:text-properties officeooo:rsid="00204220"/>
    </style:style>
    <style:style style:name="T14" style:family="text">
      <style:text-properties officeooo:rsid="0020c97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ea686" style:font-weight-asian="normal" style:font-weight-complex="normal"/>
    </style:style>
    <style:style style:name="T17" style:family="text">
      <style:text-properties fo:font-weight="normal" officeooo:rsid="0020c97b" style:font-weight-asian="normal" style:font-weight-complex="normal"/>
    </style:style>
    <style:style style:name="T18" style:family="text">
      <style:text-properties style:font-name="Tempora LGC Uni" officeooo:rsid="0021be9c"/>
    </style:style>
    <style:style style:name="T19" style:family="text">
      <style:text-properties style:font-name="Tempora LGC Uni1" officeooo:rsid="0021be9c"/>
    </style:style>
    <style:style style:name="T20" style:family="text">
      <style:text-properties style:font-name="Tempora LGC Uni1" officeooo:rsid="002ea6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С по диагностике <text:span text:style-name="T1">аппаратных</text:span> неисправностей ПК</text:p>
      <text:p text:style-name="P2">1. Цель и задачи ЭС</text:p>
      <text:p text:style-name="P1">Ав<text:span text:style-name="T2">то</text:span>матизировать процессы принятия решений на основе знаний экспер<text:span text:style-name="T2">то</text:span>в в области диагностики <text:span text:style-name="T3">аппаратных </text:span>неисправностей ПК.</text:p>
      <text:p text:style-name="P1"/>
      <text:p text:style-name="P2">Задачи </text:p>
      <text:p text:style-name="P1">- помощь неуверенным (неумелым, начинающим) пользователям ПК</text:p>
      <text:p text:style-name="P1">- максимально и быстро определить класс неисправностей на основе <text:span text:style-name="T3">указанных</text:span> пользовател<text:span text:style-name="T3">ем </text:span>симп<text:span text:style-name="T2">то</text:span>мов</text:p>
      <text:p text:style-name="P1">- выявление <text:span text:style-name="T3">аппаратной</text:span> неисправности и рекомендации по ее устранению</text:p>
      <text:p text:style-name="P1">- <text:span text:style-name="T4">формирование отчета о диагностике</text:span></text:p>
      <text:p text:style-name="P1">- <text:span text:style-name="T5">поддержка принятия решения</text:span></text:p>
      <text:p text:style-name="P1"/>
      <text:p text:style-name="P3">2. Правила</text:p>
      <text:p text:style-name="P4">1. Если не работает экран, то не подключен провод питания</text:p>
      <text:p text:style-name="P4">2. Если не работает экран, то не подключен интерфейсный порт</text:p>
      <text:p text:style-name="P4">3. Если не работает экран и подключен интерфейсный порт, то неисправна видеокарта</text:p>
      <text:p text:style-name="P4">4. Если не работает экран и подключен провод питания и подключен интерфейсный порт, то не исправен экран.</text:p>
      <text:p text:style-name="P4">5. Если не включает системный блок, то провод не подключен к сети</text:p>
      <text:p text:style-name="P4">6. Если не включает системный блок и он подключен к сети, то выключатель блока питания переключен в состояние вкл</text:p>
      <text:p text:style-name="P4">7. Если системный блок непрерывно пищит при включении, то неисправна оперативная память</text:p>
      <text:p text:style-name="P4">8. Если системный издает короткие писки, то неисправна материнская плата</text:p>
      <text:p text:style-name="P4">9. Если не работает мышь, то она не подключена к системному блоку</text:p>
      <text:p text:style-name="P4">10. Если не работает мышь и она подключена к системному блоку, то загрязнен светодиод</text:p>
      <text:p text:style-name="P4">11. Если не работает мышь и она подключена к системному блоку и не загрязнен светодиод, то мышь неисправна.</text:p>
      <text:p text:style-name="P4">12. Если не работает клавиатура, то она не подключена к системному блоку</text:p>
      <text:p text:style-name="P4">13. Если не работает клавиатура и она подключена к системному блоку, то она не исправна</text:p>
      <text:p text:style-name="P4">14. Если не работает звук, то проверить подключение колонки</text:p>
      <text:p text:style-name="P4">15. Если не работает звук и колонки подключены, проверить установленную громкость</text:p>
      <text:p text:style-name="P4">16. Если не работает звук и колонки подключены и громкость не нулевая, то колонки неисправны</text:p>
      <text:p text:style-name="P4">17. Если при старте слышен длинный писк и 2 коротких, то неисправна видеокарта</text:p>
      <text:p text:style-name="P4">18. Если ПК греется выше 95ºС, то неисправен кулер</text:p>
      <text:p text:style-name="P4">19. Если ПК греется выше 95ºС и исправен кулер, то термопаста отсутствует или высохла</text:p>
      <text:p text:style-name="P4">20. Если не стартует ОС, то проверить подключение SATA кабеля</text:p>
      <text:p text:style-name="P5"/>
      <text:p text:style-name="P6">3. Словарь</text:p>
      <text:list text:style-name="L1">
        <text:list-item>
          <text:p text:style-name="P7">ОС</text:p>
        </text:list-item>
        <text:list-item>
          <text:p text:style-name="P7">Системный блок</text:p>
        </text:list-item>
        <text:list-item>
          <text:p text:style-name="P7">Звук</text:p>
        </text:list-item>
        <text:list-item>
          <text:p text:style-name="P7">Мышь</text:p>
        </text:list-item>
        <text:list-item>
          <text:p text:style-name="P7">Клавиатура</text:p>
        </text:list-item>
        <text:list-item>
          <text:p text:style-name="P7">Кулер</text:p>
        </text:list-item>
        <text:list-item>
          <text:p text:style-name="P7">SATA кабель</text:p>
        </text:list-item>
        <text:list-item>
          <text:p text:style-name="P7">Интерфейсный порт</text:p>
        </text:list-item>
        <text:list-item>
          <text:p text:style-name="P7">Видеокарта</text:p>
        </text:list-item>
        <text:list-item>
          <text:p text:style-name="P7"><text:soft-page-break/>Термопаста</text:p>
        </text:list-item>
        <text:list-item>
          <text:p text:style-name="P7">Оперативная память </text:p>
        </text:list-item>
        <text:list-item>
          <text:p text:style-name="P7">СвеTHENдиод</text:p>
          <text:p text:style-name="P7"><draw:frame draw:style-name="fr1" draw:name="Изображение1" text:anchor-type="char" svg:width="18.113cm" svg:height="4.131cm" draw:z-index="0"><draw:image xlink:href="Pictures/1000000100000A00000002485B0EF887.png" xlink:type="simple" xlink:show="embed" xlink:actuate="onLoad" draw:mime-type="image/png"/></draw:frame></text:p>
        </text:list-item>
      </text:list>
      <text:p text:style-name="P8"><text:span text:style-name="T6">4</text:span>. <text:span text:style-name="T6">Сос</text:span><text:span text:style-name="T2">то</text:span><text:span text:style-name="T6">яния системы</text:span></text:p>
      <text:list text:style-name="L2">
        <text:list-item>
          <text:p text:style-name="P9">Система питания</text:p>
        </text:list-item>
        <text:list-item>
          <text:p text:style-name="P9">Нет звука</text:p>
        </text:list-item>
        <text:list-item>
          <text:p text:style-name="P9">Не работает экран</text:p>
        </text:list-item>
        <text:list-item>
          <text:p text:style-name="P9">Не работает мышь</text:p>
        </text:list-item>
        <text:list-item>
          <text:p text:style-name="P10">Не работает клавиатура</text:p>
        </text:list-item>
        <text:list-item>
          <text:p text:style-name="P10">ПК греется</text:p>
        </text:list-item>
        <text:list-item>
          <text:p text:style-name="P10">Системный блок пищит</text:p>
        </text:list-item>
        <text:list-item>
          <text:p text:style-name="P10">Не стартует ОС</text:p>
        </text:list-item>
        <text:list-item>
          <text:p text:style-name="P11">Не работает экран, но питание подключено</text:p>
        </text:list-item>
        <text:list-item>
          <text:p text:style-name="P11">Не работает мышь, но мышь подключена к системному блоку</text:p>
        </text:list-item>
        <text:list-item>
          <text:p text:style-name="P11">Не работает клавиатура, но клавиатура подключена к системному блоку</text:p>
        </text:list-item>
        <text:list-item>
          <text:p text:style-name="P12"><text:span text:style-name="T7">Н</text:span>е работает звук, <text:span text:style-name="T7">но</text:span> колонки подключены <text:span text:style-name="T7">к системному блоку</text:span></text:p>
        </text:list-item>
      </text:list>
      <text:p text:style-name="P13"/>
      <text:p text:style-name="P6">5 <text:span text:style-name="T8">Возможные сос</text:span><text:span text:style-name="T2">то</text:span><text:span text:style-name="T8">яния в виде графа</text:span></text:p>
      <text:p text:style-name="P6"><draw:frame draw:style-name="fr2" draw:name="Изображение2" text:anchor-type="char" svg:width="17cm" svg:height="6.819cm" draw:z-index="1"><draw:image xlink:href="Pictures/1000000100000A00000004039FC7F928.png" xlink:type="simple" xlink:show="embed" xlink:actuate="onLoad" draw:mime-type="image/png"/></draw:frame></text:p>
      <text:p text:style-name="P14">6. Пример использования ЭС</text:p>
      <text:p text:style-name="P15">1) Не работает звук → Колонки подключены → Громкость нулевая → Громкость = 0</text:p>
      <text:p text:style-name="P15">2) Не включается системный блок → <text:s/>Кабель подключен к сети → Переключатель БП включен → <text:s/>Звуковые сигналы → Непрерывный писк → <text:s/>Неисправна ОЗУ</text:p>
      <text:p text:style-name="P14">7.</text:p>
      <text:p text:style-name="P16">М — мышь</text:p>
      <text:p text:style-name="P16">С — системный блок</text:p>
      <text:p text:style-name="P16">П — питание</text:p>
      <text:p text:style-name="P16">К — э<text:span text:style-name="T9">то</text:span>т компьютер </text:p>
      <text:p text:style-name="P16"><text:soft-page-break/>НеРаботает(К, М) → НеПодключена(К, С)</text:p>
      <text:p text:style-name="P16">НеРаботает(К, М, С) → НетПитания(К, П)</text:p>
      <text:p text:style-name="P17">8. Продукционные правила</text:p>
      <text:list text:style-name="L3">
        <text:list-item>
          <text:p text:style-name="P18"><text:span text:style-name="T10">IF</text:span> не работает экран, <text:span text:style-name="T10">THEN</text:span> не подключен провод питания </text:p>
        </text:list-item>
        <text:list-item>
          <text:p text:style-name="P19">IF не работает экран <text:span text:style-name="T11">AND </text:span>подключен провод питания, THEN не подключен интерфейсный порт</text:p>
        </text:list-item>
        <text:list-item>
          <text:p text:style-name="P19">IF не работает экран <text:span text:style-name="T11">AND </text:span>подключен провод питания <text:span text:style-name="T11">AND</text:span><text:span text:style-name="T1"> </text:span>подключен интерфейсный порт, <text:span text:style-name="T1">THEN неисправна видеокарта</text:span></text:p>
        </text:list-item>
        <text:list-item>
          <text:p text:style-name="P18">IF не работает экран <text:span text:style-name="T11">AND</text:span> подключен провод питания <text:span text:style-name="T11">AND</text:span> подключен <text:s/>интерфейсный порт, THEN не исправен экран.</text:p>
        </text:list-item>
        <text:list-item>
          <text:p text:style-name="P20">IF не включает системный блок, THEN провод не <text:span text:style-name="T12">подключен к сети</text:span></text:p>
        </text:list-item>
        <text:list-item>
          <text:p text:style-name="P21"><text:span text:style-name="T13">IF не включает системный блок </text:span><text:span text:style-name="T11">AND</text:span><text:span text:style-name="T12"> он подключен к сети</text:span><text:span text:style-name="T13">, THEN </text:span>выключатель блока питани<text:span text:style-name="T13">я переключен в сос</text:span><text:span text:style-name="T11">то</text:span><text:span text:style-name="T13">яние вкл</text:span></text:p>
        </text:list-item>
        <text:list-item>
          <text:p text:style-name="P20">IF системный блок непрерывно пищит при включении, THEN неисправна оперативная память</text:p>
        </text:list-item>
        <text:list-item>
          <text:p text:style-name="P20">IF системный издает короткие писки, THEN неисправна материнская плата</text:p>
        </text:list-item>
        <text:list-item>
          <text:p text:style-name="P20">IF не работает мышь, THEN она не подключена к системному блоку</text:p>
        </text:list-item>
        <text:list-item>
          <text:p text:style-name="P20">IF не работает мышь <text:span text:style-name="T11">AND</text:span> она подключена к системному блоку, <text:span text:style-name="T12">T</text:span>HEN загрязнен све<text:span text:style-name="T11">то</text:span>диод</text:p>
        </text:list-item>
        <text:list-item>
          <text:p text:style-name="P20">IF не работает мышь <text:span text:style-name="T11">AND</text:span><text:span text:style-name="T12"> она подключена к </text:span><text:s/>системному блоку <text:span text:style-name="T11">AND</text:span><text:span text:style-name="T12"> не загрязнен све</text:span><text:span text:style-name="T11">то</text:span><text:span text:style-name="T12">диод, THEN мышь неисправна.</text:span></text:p>
        </text:list-item>
        <text:list-item>
          <text:p text:style-name="P22">IF не работает клавиатура, THEN она не подключена к системному блоку</text:p>
        </text:list-item>
        <text:list-item>
          <text:p text:style-name="P22">IF не работает клавиатура <text:span text:style-name="T11">AND</text:span> она подключена к системному блоку, THEN она не исправна</text:p>
        </text:list-item>
        <text:list-item>
          <text:p text:style-name="P22">IF не работает звук, THEN проверить подключение колонки</text:p>
        </text:list-item>
        <text:list-item>
          <text:p text:style-name="P22">IF не работает звук <text:span text:style-name="T11">AND</text:span> колонки подключены, проверить установленную громкость</text:p>
        </text:list-item>
        <text:list-item>
          <text:p text:style-name="P22">IF не работает звук <text:span text:style-name="T11">AND</text:span> колонки подключены <text:span text:style-name="T11">AND</text:span> громкость не нулевая, THEN колонки неисправны</text:p>
        </text:list-item>
        <text:list-item>
          <text:p text:style-name="P22"><text:span text:style-name="T14">IF п</text:span>ри старте слышен длинный<text:span text:style-name="Strong_20_Emphasis"> </text:span><text:span text:style-name="Strong_20_Emphasis"><text:span text:style-name="T15">писк </text:span></text:span><text:span text:style-name="Strong_20_Emphasis"><text:span text:style-name="T16">AND</text:span></text:span><text:span text:style-name="Strong_20_Emphasis"><text:span text:style-name="T15"> 2 коротких, </text:span></text:span><text:span text:style-name="Strong_20_Emphasis"><text:span text:style-name="T17">THEN н</text:span></text:span>еисправна видеокарта</text:p>
        </text:list-item>
        <text:list-item>
          <text:p text:style-name="P23">IF ПК греется выше 95<text:span text:style-name="T18">º</text:span><text:span text:style-name="T19">С</text:span>, THEN неисправен кулер</text:p>
        </text:list-item>
        <text:list-item>
          <text:p text:style-name="P23">IF ПК греется выше 95<text:span text:style-name="T18">º</text:span><text:span text:style-name="T19">С </text:span><text:span text:style-name="T20">AND</text:span><text:span text:style-name="T19"> </text:span>исправен кулер, <text:span text:style-name="T1">THEN термопаста отсутствует или высохла</text:span></text:p>
        </text:list-item>
        <text:list-item>
          <text:p text:style-name="P24">IF не стартует ОС, THEN проверить подключение SATA кабеля</text:p>
        </text:list-item>
      </text:list>
      <text:p text:style-name="P17"><text:tab/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27T10:33:57.194005628</dc:date>
    <meta:editing-duration>PT1H14M45S</meta:editing-duration>
    <meta:editing-cycles>18</meta:editing-cycles>
    <meta:document-statistic meta:table-count="0" meta:image-count="2" meta:object-count="0" meta:page-count="4" meta:paragraph-count="89" meta:word-count="752" meta:character-count="4661" meta:non-whitespace-character-count="4027"/>
  </office:meta>
</office:document-meta>
</file>